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3C000004933D8407BA.jpg" manifest:media-type="image/jpeg"/>
  <manifest:file-entry manifest:full-path="Pictures/100000010000012800000067F42C2B86.png" manifest:media-type="image/png"/>
  <manifest:file-entry manifest:full-path="Pictures/10000000000003170000026669332285.jpg" manifest:media-type="image/jpeg"/>
  <manifest:file-entry manifest:full-path="Pictures/1000000000000AC0000006005D268AB7.jpg" manifest:media-type="image/jpeg"/>
  <manifest:file-entry manifest:full-path="Pictures/100000010000029F0000021023B0EFEE.png" manifest:media-type="image/png"/>
  <manifest:file-entry manifest:full-path="Pictures/100000000000085000000389E532B103.jpg" manifest:media-type="image/jpeg"/>
  <manifest:file-entry manifest:full-path="Pictures/1000000000000850000004807360CB59.jpg" manifest:media-type="image/jpeg"/>
  <manifest:file-entry manifest:full-path="Pictures/10000001000007600000048E00FB3486.png" manifest:media-type="image/png"/>
  <manifest:file-entry manifest:full-path="Pictures/10000000000004C9000006A45C59C0B2.jpg" manifest:media-type="image/jpeg"/>
  <manifest:file-entry manifest:full-path="Pictures/TablePreview2.svm" manifest:media-type=""/>
  <manifest:file-entry manifest:full-path="Pictures/100000010000045B00000225A813FADA.png" manifest:media-type="image/png"/>
  <manifest:file-entry manifest:full-path="Pictures/TablePreview1.svm" manifest:media-type=""/>
  <manifest:file-entry manifest:full-path="Pictures/1000000100000100000001007ADD5367.png" manifest:media-type="image/png"/>
  <manifest:file-entry manifest:full-path="Pictures/10000000000002430000021447006128.jpg" manifest:media-type="image/jpeg"/>
  <manifest:file-entry manifest:full-path="Pictures/10000000000001F4000001E186D4DF5B.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DDC64086.png" manifest:media-type="image/png"/>
  <manifest:file-entry manifest:full-path="Pictures/10000001000002C60000079E2ABF0656.png" manifest:media-type="image/png"/>
  <manifest:file-entry manifest:full-path="Pictures/1000000100000100000001002211A91E.png" manifest:media-type="image/png"/>
  <manifest:file-entry manifest:full-path="Pictures/10000001000003730000012F6D832605.png" manifest:media-type="image/png"/>
  <manifest:file-entry manifest:full-path="Pictures/1000000000000331000002181DA0EDE3.jpg" manifest:media-type="image/jpeg"/>
  <manifest:file-entry manifest:full-path="Pictures/10000001000004E80000020FE2C00961.png" manifest:media-type="image/png"/>
  <manifest:file-entry manifest:full-path="Pictures/10000001000004180000021F0517D9FA.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8"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9" style:family="graphic" style:parent-style-name="Style_20_de_20_dessin_20_par_20_défaut_5f_2" style:list-style-name="L5">
      <style:graphic-properties draw:stroke="none" svg:stroke-width="0cm" draw:fill="none"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12"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graphic-properties style:writing-mode="lr-tb" loext:decorative="false"/>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none" fo:min-height="3.44cm" loext:decorative="false"/>
      <style:paragraph-properties style:writing-mode="lr-tb"/>
    </style:style>
    <style:style style:name="gr2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graphic-properties draw:stroke="none" draw:fill="none" fo:min-height="1.424cm" loext:decorative="false"/>
      <style:paragraph-properties style:writing-mode="lr-tb"/>
    </style:style>
    <style:style style:name="gr30" style:family="graphic" style:parent-style-name="standard">
      <style:graphic-properties draw:stroke="none" draw:fill="none" fo:min-height="6.613cm" loext:decorative="false"/>
      <style:paragraph-properties style:writing-mode="lr-tb"/>
    </style:style>
    <style:style style:name="gr31"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draw:fill="none" fo:min-height="2.846cm" loext:decorative="false"/>
      <style:paragraph-properties style:writing-mode="lr-tb"/>
    </style:style>
    <style:style style:name="gr33"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4"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5" style:family="graphic" style:parent-style-name="standard">
      <style:graphic-properties draw:stroke="none" draw:fill="none" draw:fill-color="#ffffff" loext:fill-use-slide-background="false" fo:min-height="1.533cm" loext:decorative="false"/>
      <style:paragraph-properties style:writing-mode="lr-tb"/>
    </style:style>
    <style:style style:name="gr36"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7" style:family="graphic" style:parent-style-name="standard" style:list-style-name="L14">
      <style:graphic-properties draw:stroke="none" svg:stroke-color="#666666" draw:fill="none" fo:min-height="8.734cm" loext:decorative="false"/>
      <style:paragraph-properties style:writing-mode="lr-tb"/>
    </style:style>
    <style:style style:name="gr38" style:family="graphic" style:parent-style-name="standard" style:list-style-name="L14">
      <style:graphic-properties draw:stroke="none" draw:fill="none" fo:min-height="11.163cm" loext:decorative="false"/>
      <style:paragraph-properties style:writing-mode="lr-tb"/>
    </style:style>
    <style:style style:name="gr39" style:family="graphic" style:parent-style-name="standard" style:list-style-name="L1">
      <style:graphic-properties draw:stroke="none" draw:fill="none" fo:min-height="2.835cm" loext:decorative="false"/>
      <style:paragraph-properties style:writing-mode="lr-tb"/>
    </style:style>
    <style:style style:name="gr40" style:family="graphic" style:parent-style-name="standard">
      <style:graphic-properties loext:decorative="false"/>
    </style:style>
    <style:style style:name="gr41"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2"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3" style:family="graphic" style:parent-style-name="standard">
      <style:graphic-properties draw:stroke="none" draw:fill="none" fo:min-height="0.848cm" loext:decorative="false"/>
      <style:paragraph-properties style:writing-mode="lr-tb"/>
    </style:style>
    <style:style style:name="gr4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5"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16">
      <style:graphic-properties draw:stroke="none" draw:fill="none" fo:min-height="10.519cm" loext:decorative="false"/>
      <style:paragraph-properties style:writing-mode="lr-tb"/>
    </style:style>
    <style:style style:name="gr48"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9" style:family="graphic" style:parent-style-name="standard">
      <style:graphic-properties draw:stroke="none" draw:fill="none" fo:min-height="4.375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51" style:family="graphic" style:parent-style-name="standard">
      <style:graphic-properties draw:stroke="none" draw:fill="none" fo:min-height="2.116cm" loext:decorative="false"/>
      <style:paragraph-properties style:writing-mode="lr-tb"/>
    </style:style>
    <style:style style:name="gr5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3" style:family="graphic" style:parent-style-name="standard">
      <style:graphic-properties draw:stroke="none" draw:fill="none" fo:min-height="1.459cm" loext:decorative="false"/>
      <style:paragraph-properties style:writing-mode="lr-tb"/>
    </style:style>
    <style:style style:name="gr54" style:family="graphic" style:parent-style-name="standard">
      <style:graphic-properties draw:stroke="none" draw:fill="none" fo:min-height="4.456cm" loext:decorative="false"/>
      <style:paragraph-properties style:writing-mode="lr-tb"/>
    </style:style>
    <style:style style:name="gr55" style:family="graphic" style:parent-style-name="standard">
      <style:graphic-properties draw:stroke="none" draw:fill="none" fo:min-height="0.973cm" loext:decorative="false"/>
      <style:paragraph-properties style:writing-mode="lr-tb"/>
    </style:style>
    <style:style style:name="gr56" style:family="graphic" style:parent-style-name="standard">
      <style:graphic-properties draw:stroke="none" draw:fill="none" fo:min-height="8.911cm" loext:decorative="false"/>
      <style:paragraph-properties style:writing-mode="lr-tb"/>
    </style:style>
    <style:style style:name="gr57" style:family="graphic" style:parent-style-name="standard">
      <style:graphic-properties draw:stroke="none" draw:fill="none" fo:min-height="2.83cm" loext:decorative="false"/>
      <style:paragraph-properties style:writing-mode="lr-tb"/>
    </style:style>
    <style:style style:name="gr58"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9" style:family="graphic" style:parent-style-name="standard">
      <style:graphic-properties draw:stroke="none" draw:fill="none" fo:min-height="1.27cm" loext:decorative="false"/>
      <style:paragraph-properties style:writing-mode="lr-tb"/>
    </style:style>
    <style:style style:name="gr60" style:family="graphic" style:parent-style-name="standard">
      <style:graphic-properties draw:stroke="none" draw:fill="none" draw:textarea-horizontal-align="right" fo:min-height="1.123cm"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5"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7" style:family="graphic" style:parent-style-name="standard">
      <style:graphic-properties draw:stroke="none" draw:fill="none" fo:min-height="1.945cm" loext:decorative="false"/>
      <style:paragraph-properties style:writing-mode="lr-tb"/>
    </style:style>
    <style:style style:name="gr68" style:family="graphic" style:parent-style-name="standard">
      <style:graphic-properties draw:stroke="none" draw:fill="none" fo:min-height="8.264cm" loext:decorative="false"/>
      <style:paragraph-properties style:writing-mode="lr-tb"/>
    </style:style>
    <style:style style:name="gr69" style:family="graphic" style:parent-style-name="standard">
      <style:graphic-properties draw:stroke="none" draw:fill="none" fo:min-height="10.561cm" loext:decorative="false"/>
      <style:paragraph-properties style:writing-mode="lr-tb"/>
    </style:style>
    <style:style style:name="gr70"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graphic-properties draw:stroke="none" draw:fill="none" fo:min-height="7.318cm" loext:decorative="false"/>
      <style:paragraph-properties style:writing-mode="lr-tb"/>
    </style:style>
    <style:style style:name="gr75"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7"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8"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9"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80"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81"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graphic-properties draw:stroke="none" draw:fill="none" fo:min-height="3.897cm" loext:decorative="false"/>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draw:stroke="none" draw:fill="none" fo:min-height="2.716cm" loext:decorative="false"/>
      <style:paragraph-properties style:writing-mode="lr-tb"/>
    </style:style>
    <style:style style:name="gr8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90" style:family="graphic" style:parent-style-name="Style_20_de_20_dessin_20_par_20_défaut_5f_2" style:list-style-name="L28">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1" style:family="graphic" style:parent-style-name="Style_20_de_20_dessin_20_par_20_défaut_5f_2" style:list-style-name="L29">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6"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7"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graphic-properties draw:stroke="none" draw:fill="none" fo:min-height="7.275cm"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9">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651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outline1" style:list-style-name="L11">
      <style:graphic-properties fo:min-height="8.815cm" loext:decorative="false"/>
      <style:paragraph-properties style:writing-mode="lr-tb"/>
    </style:style>
    <style:style style:name="pr12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outline1" style:list-style-name="L11">
      <style:graphic-properties fo:min-height="8.815cm" loext:decorative="false"/>
      <style:paragraph-properties style:writing-mode="lr-tb"/>
    </style:style>
    <style:style style:name="pr13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lef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lef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lef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lef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left" style:font-independent-line-spacing="true"/>
      <style:text-properties fo:font-size="60pt" fo:language="fr" fo:country="FR"/>
    </style:style>
    <style:style style:name="P2" style:family="paragraph">
      <style:paragraph-properties fo:margin-left="0cm" fo:margin-right="0cm" fo:margin-top="0.353cm" fo:margin-bottom="0cm" fo:line-height="90%" fo:text-align="lef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lef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lef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left"/>
      <style:text-properties fo:font-size="18pt" fo:language="fr" fo:country="FR"/>
    </style:style>
    <style:style style:name="P6" style:family="paragraph">
      <style:paragraph-properties fo:margin-left="0cm" fo:margin-right="0cm" fo:margin-top="0cm" fo:margin-bottom="0cm" fo:line-height="100%" fo:text-align="lef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style:paragraph-properties fo:margin-left="0cm" fo:margin-right="0cm" fo:margin-top="0cm" fo:margin-bottom="0cm" fo:line-height="100%" fo:text-align="left" fo:text-indent="0cm" style:punctuation-wrap="hanging" loext:tab-stop-distance="2.54cm">
        <style:tab-stops/>
      </style:paragraph-properties>
      <style:text-properties fo:color="#000000" loext:opacity="100%" fo:font-size="14pt" fo:language="fr" fo:country="FR" style:font-size-asian="14pt" style:font-size-complex="14pt" fo:hyphenate="false"/>
    </style:style>
    <style:style style:name="P9"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color="#000000" loext:opacity="100%" fo:font-size="14pt" fo:language="fr" fo:country="FR" style:font-size-asian="14pt" style:font-size-complex="14pt" fo:hyphenate="false"/>
    </style:style>
    <style:style style:name="P10" style:family="paragraph">
      <loext:graphic-properties draw:fill="none" draw:fill-color="#ffffff"/>
      <style:paragraph-properties fo:margin-left="0.6cm" fo:margin-right="0cm" fo:margin-top="0cm" fo:margin-bottom="0cm" fo:line-height="100%" fo:text-align="lef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right"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3" style:family="paragraph">
      <style:paragraph-properties fo:margin-left="0cm" fo:margin-right="0cm" fo:margin-top="0cm" fo:margin-bottom="0cm" fo:line-height="90%" fo:text-align="left" fo:text-indent="0cm" style:punctuation-wrap="hanging" loext:tab-stop-distance="2.54cm" style:writing-mode="lr-tb">
        <style:tab-stops/>
      </style:paragraph-properties>
      <style:text-properties fo:hyphenate="false"/>
    </style:style>
    <style:style style:name="P14"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5" style:family="paragraph">
      <style:paragraph-properties fo:margin-left="1.27cm" fo:margin-right="0cm" fo:text-indent="-0.635cm"/>
      <style:text-properties fo:hyphenate="false" loext:hyphenation-no-caps="false" loext:hyphenation-no-last-word="false"/>
    </style:style>
    <style:style style:name="P16" style:family="paragraph">
      <loext:graphic-properties draw:fill="none"/>
      <style:paragraph-properties fo:margin-left="1.27cm" fo:margin-right="0cm" fo:margin-top="0.353cm" fo:margin-bottom="0cm" fo:line-height="100%" fo:text-align="lef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7" style:family="paragraph">
      <style:paragraph-properties fo:margin-left="0cm" fo:margin-right="0cm" fo:line-height="90%" fo:text-indent="0cm" style:punctuation-wrap="hanging" loext:tab-stop-distance="2.54cm">
        <style:tab-stops/>
      </style:paragraph-properties>
    </style:style>
    <style:style style:name="P18"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9" style:family="paragraph">
      <style:paragraph-properties fo:line-height="115%"/>
    </style:style>
    <style:style style:name="P20" style:family="paragraph">
      <style:paragraph-properties fo:line-height="115%"/>
      <style:text-properties fo:font-size="28pt" fo:language="fr" fo:country="FR" style:font-size-asian="28pt" style:font-size-complex="28pt"/>
    </style:style>
    <style:style style:name="P21" style:family="paragraph">
      <loext:graphic-properties draw:fill-color="#ffffff"/>
      <style:text-properties fo:language="fr" fo:country="FR"/>
    </style:style>
    <style:style style:name="P22"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font-size="40pt" fo:language="fr" fo:country="FR" fo:hyphenate="false"/>
    </style:style>
    <style:style style:name="P23"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3.5pt" fo:language="fr" fo:country="FR" fo:hyphenate="false"/>
    </style:style>
    <style:style style:name="P24" style:family="paragraph">
      <loext:graphic-properties draw:fill="solid" draw:fill-color="#ffffff"/>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13.5pt" fo:language="fr" fo:country="FR" fo:hyphenate="false"/>
    </style:style>
    <style:style style:name="P25" style:family="paragraph">
      <loext:graphic-properties draw:fill-color="#ffffff"/>
      <style:text-properties fo:font-size="28.1000003814697pt" fo:language="fr" fo:country="FR"/>
    </style:style>
    <style:style style:name="P26" style:family="paragraph">
      <loext:graphic-properties draw:fill="none" draw:fill-color="#ffffff"/>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13.5pt" fo:language="fr" fo:country="FR" fo:hyphenate="false"/>
    </style:style>
    <style:style style:name="P27" style:family="paragraph">
      <loext:graphic-properties draw:fill="none"/>
      <style:paragraph-properties fo:text-align="center"/>
    </style:style>
    <style:style style:name="P28" style:family="paragraph">
      <style:paragraph-properties fo:margin-left="0cm" fo:margin-right="0cm" fo:margin-top="0.42cm" fo:margin-bottom="0.35cm" fo:line-height="100%" fo:text-align="left" fo:text-indent="0cm" style:punctuation-wrap="hanging" loext:tab-stop-distance="2.54cm" style:writing-mode="lr-tb">
        <style:tab-stops/>
      </style:paragraph-properties>
      <style:text-properties fo:font-size="13.5pt" fo:language="fr" fo:country="FR" fo:hyphenate="false"/>
    </style:style>
    <style:style style:name="P29" style:family="paragraph">
      <loext:graphic-properties draw:fill="solid" draw:fill-color="#ffffff"/>
      <style:paragraph-properties fo:margin-left="0cm" fo:margin-right="0cm" fo:margin-top="0.42cm" fo:margin-bottom="0.35cm" fo:line-height="100%" fo:text-align="left" fo:text-indent="0cm" style:punctuation-wrap="hanging" loext:tab-stop-distance="2.54cm" style:writing-mode="lr-tb" style:font-independent-line-spacing="true">
        <style:tab-stops/>
      </style:paragraph-properties>
      <style:text-properties fo:font-size="13.5pt" fo:language="fr" fo:country="FR" fo:hyphenate="false"/>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5cm" fo:margin-bottom="0cm" fo:line-height="100%" fo:text-align="left" fo:text-indent="0cm" style:punctuation-wrap="hanging" loext:tab-stop-distance="2.54cm" style:writing-mode="lr-tb">
        <style:tab-stops/>
      </style:paragraph-properties>
      <style:text-properties fo:hyphenate="false" loext:hyphenation-no-caps="false" loext:hyphenation-no-last-word="false"/>
    </style:style>
    <style:style style:name="P32" style:family="paragraph">
      <loext:graphic-properties draw:fill="none"/>
      <style:paragraph-properties fo:margin-left="0cm" fo:margin-right="0cm" fo:margin-top="0.5cm" fo:margin-bottom="0cm" fo:line-height="100%" fo:text-align="lef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33" style:family="paragraph">
      <loext:graphic-properties draw:fill="none"/>
      <style:paragraph-properties fo:margin-left="0cm" fo:margin-right="0cm" fo:margin-top="0.353cm" fo:margin-bottom="0cm" fo:line-height="90%" fo:text-align="lef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4" style:family="paragraph">
      <loext:graphic-properties draw:fill="solid" draw:fill-color="#ed7d31"/>
      <style:paragraph-properties fo:text-align="lef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5" style:family="paragraph">
      <style:paragraph-properties fo:line-height="100%"/>
    </style:style>
    <style:style style:name="P36" style:family="paragraph">
      <style:paragraph-properties fo:margin-left="0cm" fo:margin-right="0cm" fo:margin-top="0.375cm" fo:margin-bottom="0cm" fo:line-height="100%" fo:text-align="left" fo:text-indent="0cm" style:punctuation-wrap="hanging" style:writing-mode="lr-tb"/>
      <style:text-properties fo:hyphenate="false"/>
    </style:style>
    <style:style style:name="P37" style:family="paragraph">
      <style:paragraph-properties fo:line-height="100%"/>
      <style:text-properties fo:language="fr" fo:country="FR"/>
    </style:style>
    <style:style style:name="P38" style:family="paragraph">
      <style:paragraph-properties fo:margin-top="0.42cm" fo:margin-bottom="0.35cm" fo:text-align="left"/>
    </style:style>
    <style:style style:name="P39" style:family="paragraph">
      <style:paragraph-properties fo:margin-top="0.42cm" fo:margin-bottom="0.35cm" fo:text-align="right"/>
    </style:style>
    <style:style style:name="P40" style:family="paragraph">
      <loext:graphic-properties draw:fill="none"/>
      <style:paragraph-properties fo:margin-top="0.42cm" fo:margin-bottom="0.35cm" fo:text-align="left"/>
      <style:text-properties fo:font-size="10pt" fo:language="fr" fo:country="FR" style:font-size-asian="10pt" style:font-size-complex="10pt"/>
    </style:style>
    <style:style style:name="P41" style:family="paragraph">
      <style:paragraph-properties fo:text-align="right"/>
    </style:style>
    <style:style style:name="P42" style:family="paragraph">
      <loext:graphic-properties draw:fill="none"/>
      <style:paragraph-properties fo:text-align="right"/>
      <style:text-properties style:font-name="Corbel" fo:font-size="13pt" fo:language="fr" fo:country="FR" fo:font-style="italic" style:font-size-asian="13pt" style:font-style-asian="italic" style:font-size-complex="13pt" style:font-style-complex="italic"/>
    </style:style>
    <style:style style:name="P43"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4" style:family="paragraph">
      <loext:graphic-properties draw:fill="none"/>
      <style:text-properties fo:font-size="18pt"/>
    </style:style>
    <style:style style:name="P45" style:family="paragraph">
      <style:paragraph-properties fo:margin-left="0cm" fo:margin-right="0cm" fo:margin-top="0cm" fo:margin-bottom="0cm" fo:line-height="90%" fo:text-align="right" fo:text-indent="0cm" style:punctuation-wrap="hanging" loext:tab-stop-distance="2.54cm" style:writing-mode="lr-tb">
        <style:tab-stops/>
      </style:paragraph-properties>
      <style:text-properties fo:hyphenate="false"/>
    </style:style>
    <style:style style:name="P46"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7" style:family="paragraph">
      <style:paragraph-properties fo:margin-top="0.42cm" fo:margin-bottom="0.35cm"/>
    </style:style>
    <style:style style:name="P48" style:family="paragraph">
      <loext:graphic-properties draw:fill="none"/>
      <style:paragraph-properties fo:margin-top="0.42cm" fo:margin-bottom="0.35cm"/>
      <style:text-properties fo:font-size="10pt" style:font-size-asian="10pt" style:font-size-complex="10pt"/>
    </style:style>
    <style:style style:name="P49" style:family="paragraph">
      <style:paragraph-properties fo:line-height="115%"/>
      <style:text-properties fo:font-size="22pt" fo:language="fr" fo:country="FR" style:font-size-asian="22pt" style:font-size-complex="22pt"/>
    </style:style>
    <style:style style:name="P50" style:family="paragraph">
      <style:text-properties fo:language="fr" fo:country="FR"/>
    </style:style>
    <style:style style:name="P51" style:family="paragraph">
      <loext:graphic-properties draw:fill="none" draw:fill-color="#ffffff"/>
      <style:text-properties fo:font-size="18pt" fo:language="fr" fo:country="FR"/>
    </style:style>
    <style:style style:name="P52" style:family="paragraph">
      <loext:graphic-properties draw:fill="none" draw:fill-color="#ffffff"/>
      <style:text-properties style:font-name="Corbel" fo:font-size="18pt"/>
    </style:style>
    <style:style style:name="P53" style:family="paragraph">
      <style:paragraph-properties fo:margin-left="0cm" fo:margin-right="0cm" fo:margin-top="0.22cm" fo:margin-bottom="0.15cm" fo:line-height="100%" fo:text-align="left" fo:text-indent="0cm"/>
    </style:style>
    <style:style style:name="P54" style:family="paragraph">
      <loext:graphic-properties draw:fill="none"/>
      <style:paragraph-properties fo:margin-left="0cm" fo:margin-right="0cm" fo:margin-top="0.22cm" fo:margin-bottom="0.15cm" fo:line-height="100%" fo:text-align="left" fo:text-indent="0cm"/>
      <style:text-properties fo:font-variant="normal" fo:text-transform="none" fo:color="#666666" loext:opacity="100%" style:text-outline="false" style:text-line-through-style="none" style:text-line-through-type="none" style:font-name="Liberation Sans1"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5" style:family="paragraph">
      <style:paragraph-properties fo:margin-left="0cm" fo:margin-right="0cm" fo:margin-top="0.22cm" fo:margin-bottom="0.15cm" fo:line-height="100%" fo:text-align="left" fo:text-indent="0cm"/>
      <style:text-properties fo:hyphenate="false" loext:hyphenation-no-caps="false" loext:hyphenation-no-last-word="false"/>
    </style:style>
    <style:style style:name="P56" style:family="paragraph">
      <style:paragraph-properties fo:margin-left="0cm" fo:margin-right="0cm" fo:margin-top="0.32cm" fo:margin-bottom="0.25cm" fo:line-height="100%" fo:text-align="left" fo:text-indent="0cm"/>
      <style:text-properties fo:hyphenate="false" loext:hyphenation-no-caps="false" loext:hyphenation-no-last-word="false"/>
    </style:style>
    <style:style style:name="P57" style:family="paragraph">
      <loext:graphic-properties draw:fill="none"/>
      <style:paragraph-properties fo:margin-left="0cm" fo:margin-right="0cm" fo:margin-top="0.22cm" fo:margin-bottom="0.15cm" fo:line-height="100%" fo:text-align="left" fo:text-indent="0cm"/>
      <style:text-properties fo:font-variant="normal" fo:text-transform="none" style:use-window-font-color="true" loext:opacity="0%" style:text-outline="false" style:text-line-through-style="none" style:text-line-through-type="none" style:font-name="Liberation Sans1"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374cm" fo:margin-bottom="0cm" fo:line-height="100%" fo:text-align="left" fo:text-indent="0cm" style:punctuation-wrap="hanging" style:writing-mode="lr-tb"/>
      <style:text-properties fo:hyphenate="false"/>
    </style:style>
    <style:style style:name="P59" style:family="paragraph">
      <loext:graphic-properties draw:fill="none"/>
      <style:paragraph-properties fo:margin-left="0cm" fo:margin-right="0cm" fo:margin-top="0.374cm" fo:margin-bottom="0cm" fo:line-height="100%" fo:text-align="left" fo:text-indent="0cm" style:punctuation-wrap="hanging"/>
      <style:text-properties fo:font-size="10pt" fo:language="fr" fo:country="FR" style:font-size-asian="10pt" style:font-size-complex="10pt" fo:hyphenate="false"/>
    </style:style>
    <style:style style:name="P60"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61" style:family="paragraph">
      <style:paragraph-properties fo:line-height="115%" fo:text-align="left" style:punctuation-wrap="hanging" style:writing-mode="lr-tb"/>
      <style:text-properties style:font-name="Corbel" fo:font-size="18pt" fo:font-weight="bold" style:font-size-asian="18pt" style:font-weight-asian="bold" style:font-size-complex="18pt" style:font-weight-complex="bold" fo:hyphenate="false"/>
    </style:style>
    <style:style style:name="P62" style:family="paragraph">
      <style:paragraph-properties fo:line-height="115%" fo:text-align="center"/>
      <style:text-properties style:font-name="Corbel" fo:font-size="18pt" style:font-size-asian="18pt" style:font-size-complex="18pt"/>
    </style:style>
    <style:style style:name="P63" style:family="paragraph">
      <style:paragraph-properties fo:line-height="115%" fo:text-align="left" style:punctuation-wrap="hanging" style:writing-mode="lr-tb"/>
      <style:text-properties style:font-name="Corbel" fo:font-size="18pt" style:font-size-asian="18pt" style:font-size-complex="18pt" fo:hyphenate="false"/>
    </style:style>
    <style:style style:name="P64" style:family="paragraph">
      <style:paragraph-properties fo:line-height="115%"/>
      <style:text-properties style:font-name="Corbel" fo:font-size="18pt" fo:font-weight="bold" style:font-size-asian="18pt" style:font-weight-asian="bold" style:font-size-complex="18pt" style:font-weight-complex="bold"/>
    </style:style>
    <style:style style:name="P65" style:family="paragraph">
      <style:paragraph-properties fo:line-height="115%"/>
      <style:text-properties style:font-name="Corbel" fo:font-size="18pt" style:font-size-asian="18pt" style:font-size-complex="18pt"/>
    </style:style>
    <style:style style:name="P66"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7" style:family="paragraph">
      <loext:graphic-properties draw:fill="none"/>
      <style:paragraph-properties fo:margin-left="0cm" fo:margin-right="0cm" fo:margin-top="0.22cm" fo:margin-bottom="0.15cm" fo:line-height="100%" fo:text-align="lef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22cm" fo:margin-bottom="0.15cm" fo:line-height="115%" fo:text-align="left" fo:text-indent="0cm"/>
    </style:style>
    <style:style style:name="P69" style:family="paragraph">
      <style:paragraph-properties fo:margin-left="0cm" fo:margin-right="0cm" fo:margin-top="0.22cm" fo:margin-bottom="0.15cm" fo:line-height="115%" fo:text-align="left" fo:text-indent="0cm"/>
      <style:text-properties fo:hyphenate="false" loext:hyphenation-no-caps="false" loext:hyphenation-no-last-word="false"/>
    </style:style>
    <style:style style:name="P70" style:family="paragraph">
      <loext:graphic-properties draw:fill="none"/>
      <style:paragraph-properties fo:margin-left="0cm" fo:margin-right="0cm" fo:margin-top="0.22cm" fo:margin-bottom="0.15cm" fo:line-height="115%" fo:text-align="lef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71" style:family="paragraph">
      <loext:graphic-properties draw:fill="none"/>
      <style:text-properties fo:font-size="18pt" fo:language="fr" fo:country="FR"/>
    </style:style>
    <style:style style:name="P72"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3" style:family="paragraph">
      <loext:graphic-properties draw:fill="none" draw:fill-color="#ffffd7"/>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4" style:family="paragraph">
      <style:paragraph-properties fo:margin-left="0cm" fo:margin-right="0cm" fo:margin-top="0.32cm" fo:margin-bottom="0.25cm" fo:line-height="100%" fo:text-align="left" fo:text-indent="0cm"/>
    </style:style>
    <style:style style:name="P75" style:family="paragraph">
      <loext:graphic-properties draw:fill="none"/>
      <style:paragraph-properties fo:margin-left="0cm" fo:margin-right="0cm" fo:margin-top="0.32cm" fo:margin-bottom="0.25cm" fo:line-height="100%" fo:text-align="left" fo:text-indent="0cm"/>
      <style:text-properties fo:font-size="10pt" fo:language="fr" fo:country="FR" style:font-size-asian="10pt" style:font-size-complex="10pt"/>
    </style:style>
    <style:style style:name="P76"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7" style:family="paragraph">
      <style:paragraph-properties fo:margin-left="0cm" fo:margin-right="0cm" fo:margin-top="0.353cm" fo:margin-bottom="0cm" fo:line-height="110%" fo:text-align="left" fo:text-indent="0cm" style:punctuation-wrap="hanging" loext:tab-stop-distance="2.54cm" style:writing-mode="lr-tb">
        <style:tab-stops/>
      </style:paragraph-properties>
      <style:text-properties fo:hyphenate="false"/>
    </style:style>
    <style:style style:name="P78" style:family="paragraph">
      <style:paragraph-properties loext:tab-stop-distance="2.54cm">
        <style:tab-stops/>
      </style:paragraph-properties>
    </style:style>
    <style:style style:name="P79" style:family="paragraph">
      <loext:graphic-properties draw:fill="none"/>
      <style:paragraph-properties fo:margin-left="0cm" fo:margin-right="0cm" fo:margin-top="0.353cm" fo:margin-bottom="0cm" fo:line-height="110%" fo:text-align="lef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80" style:family="paragraph">
      <style:paragraph-properties fo:margin-left="0cm" fo:margin-right="0cm" fo:margin-top="0.42cm" fo:margin-bottom="0.35cm" fo:line-height="110%" fo:text-align="left" fo:text-indent="0cm" style:punctuation-wrap="hanging" loext:tab-stop-distance="2.54cm" style:writing-mode="lr-tb">
        <style:tab-stops/>
      </style:paragraph-properties>
      <style:text-properties fo:hyphenate="false"/>
    </style:style>
    <style:style style:name="P81" style:family="paragraph">
      <style:paragraph-properties fo:margin-left="0cm" fo:margin-right="0cm" fo:margin-top="0.42cm" fo:margin-bottom="0.35cm" fo:line-height="115%" fo:text-align="left" fo:text-indent="0cm" style:punctuation-wrap="hanging" loext:tab-stop-distance="2.54cm" style:writing-mode="lr-tb">
        <style:tab-stops/>
      </style:paragraph-properties>
      <style:text-properties fo:hyphenate="false"/>
    </style:style>
    <style:style style:name="P82" style:family="paragraph">
      <style:paragraph-properties fo:line-height="115%" loext:tab-stop-distance="2.54cm">
        <style:tab-stops/>
      </style:paragraph-properties>
      <style:text-properties fo:hyphenate="false" loext:hyphenation-no-caps="false" loext:hyphenation-no-last-word="false"/>
    </style:style>
    <style:style style:name="P83" style:family="paragraph">
      <loext:graphic-properties draw:fill="none"/>
      <style:paragraph-properties fo:margin-left="0cm" fo:margin-right="0cm" fo:margin-top="0.42cm" fo:margin-bottom="0.35cm" fo:line-height="110%" fo:text-align="left" fo:text-indent="0cm" style:punctuation-wrap="hanging" loext:tab-stop-distance="2.54cm" style:font-independent-line-spacing="true">
        <style:tab-stops/>
      </style:paragraph-properties>
      <style:text-properties fo:font-size="28pt" fo:language="fr" fo:country="FR" fo:hyphenate="false"/>
    </style:style>
    <style:style style:name="P84" style:family="paragraph">
      <style:paragraph-properties fo:margin-left="0cm" fo:margin-right="0cm" fo:margin-top="0.176cm" fo:margin-bottom="0cm" fo:line-height="110%" fo:text-align="left" fo:text-indent="0cm" style:punctuation-wrap="hanging" loext:tab-stop-distance="2.54cm" style:writing-mode="lr-tb">
        <style:tab-stops/>
      </style:paragraph-properties>
      <style:text-properties fo:hyphenate="false"/>
    </style:style>
    <style:style style:name="P85"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6" style:family="paragraph">
      <loext:graphic-properties draw:fill="none" draw:fill-color="#ffffd7"/>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7" style:family="paragraph">
      <loext:graphic-properties draw:fill="none"/>
      <style:paragraph-properties fo:margin-top="0.42cm" fo:margin-bottom="0.35cm"/>
      <style:text-properties fo:font-size="10pt" fo:language="fr" fo:country="FR" style:font-size-asian="10pt" style:font-size-complex="10pt"/>
    </style:style>
    <style:style style:name="P88" style:family="paragraph">
      <style:paragraph-properties loext:tab-stop-distance="2.54cm">
        <style:tab-stops/>
      </style:paragraph-properties>
      <style:text-properties fo:hyphenate="false" loext:hyphenation-no-caps="false" loext:hyphenation-no-last-word="false"/>
    </style:style>
    <style:style style:name="P89" style:family="paragraph">
      <loext:graphic-properties draw:fill="none" draw:fill-color="#ffffff"/>
      <style:paragraph-properties fo:margin-left="0cm" fo:margin-right="0cm" fo:margin-top="0.42cm" fo:margin-bottom="0.35cm" fo:line-height="110%" fo:text-align="left" fo:text-indent="0cm" style:punctuation-wrap="hanging" loext:tab-stop-distance="2.54cm">
        <style:tab-stops/>
      </style:paragraph-properties>
      <style:text-properties fo:font-size="18pt" fo:language="fr" fo:country="FR" fo:hyphenate="false"/>
    </style:style>
    <style:style style:name="P90" style:family="paragraph">
      <style:paragraph-properties fo:margin-left="0cm" fo:margin-right="0cm" fo:margin-top="0.42cm" fo:margin-bottom="0.35cm" fo:line-height="90%" fo:text-align="left" fo:text-indent="0cm" style:punctuation-wrap="hanging" loext:tab-stop-distance="2.54cm" style:writing-mode="lr-tb">
        <style:tab-stops>
          <style:tab-stop style:position="0cm"/>
        </style:tab-stops>
      </style:paragraph-properties>
      <style:text-properties fo:hyphenate="false"/>
    </style:style>
    <style:style style:name="P91"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draw:fill-color="#ffffd7"/>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3" style:family="paragraph">
      <loext:graphic-properties draw:fill="none"/>
      <style:text-properties style:font-name="Corbel" fo:font-size="22pt" fo:language="fr" fo:country="FR" style:font-size-asian="22pt" style:font-size-complex="22pt"/>
    </style:style>
    <style:style style:name="P94" style:family="paragraph">
      <loext:graphic-properties draw:fill="none"/>
      <style:text-properties fo:font-size="12pt" fo:language="fr" fo:country="FR" style:font-size-asian="12pt" style:font-size-complex="12pt"/>
    </style:style>
    <style:style style:name="P95" style:family="paragraph">
      <loext:graphic-properties draw:fill="none" draw:fill-color="#ffffff"/>
      <style:text-properties style:font-name="Corbel" fo:font-size="20pt" fo:language="fr" fo:country="FR" style:font-size-asian="20pt" style:font-size-complex="20pt"/>
    </style:style>
    <style:style style:name="P96" style:family="paragraph">
      <style:text-properties fo:hyphenate="false" loext:hyphenation-no-caps="false" loext:hyphenation-no-last-word="false"/>
    </style:style>
    <style:style style:name="P97" style:family="paragraph">
      <loext:graphic-properties draw:fill="none"/>
      <style:paragraph-properties fo:text-align="lef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8" style:family="paragraph">
      <loext:graphic-properties draw:fill="none"/>
      <style:paragraph-properties fo:text-align="right"/>
      <style:text-properties fo:color="#666666" loext:opacity="100%" style:font-name="Corbel" fo:font-size="18pt" style:font-size-asian="18pt" style:font-size-complex="18pt"/>
    </style:style>
    <style:style style:name="P99" style:family="paragraph">
      <loext:graphic-properties draw:fill="none"/>
      <style:paragraph-properties fo:text-align="lef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100" style:family="paragraph">
      <loext:graphic-properties draw:fill="none" draw:fill-color="#ffffff"/>
      <style:text-properties style:font-name="Corbel" fo:font-size="20pt" style:font-size-asian="20pt" style:font-size-complex="20pt"/>
    </style:style>
    <style:style style:name="P101" style:family="paragraph">
      <loext:graphic-properties draw:fill="none" draw:fill-color="#ffffff"/>
      <style:text-properties style:font-name="Corbel"/>
    </style:style>
    <style:style style:name="P102" style:family="paragraph">
      <style:paragraph-properties fo:margin-left="0cm" fo:margin-right="0cm" fo:margin-top="0cm" fo:margin-bottom="0cm" fo:line-height="115%" fo:text-align="left" fo:text-indent="0cm" style:punctuation-wrap="hanging" loext:tab-stop-distance="2.54cm" style:writing-mode="lr-tb">
        <style:tab-stops/>
      </style:paragraph-properties>
      <style:text-properties fo:hyphenate="false"/>
    </style:style>
    <style:style style:name="P103" style:family="paragraph">
      <style:paragraph-properties fo:margin-left="0cm" fo:margin-right="0cm" fo:margin-top="0cm" fo:margin-bottom="0cm" fo:line-height="115%" fo:text-align="lef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4"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5" style:family="paragraph">
      <loext:graphic-properties draw:fill="none" draw:fill-color="#ffffd7"/>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6" style:family="paragraph">
      <style:paragraph-properties fo:margin-left="0cm" fo:margin-right="0cm" fo:margin-top="0cm" fo:margin-bottom="0cm" fo:line-height="100%" fo:text-align="lef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7" style:family="paragraph">
      <loext:graphic-properties draw:fill="none"/>
      <style:paragraph-properties fo:margin-left="0cm" fo:margin-right="0cm" fo:margin-top="0cm" fo:margin-bottom="0cm" fo:line-height="100%" fo:text-align="lef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8" style:family="paragraph">
      <loext:graphic-properties draw:fill="none"/>
      <style:text-properties fo:color="#000000" loext:opacity="100%" style:font-name="Corbel" fo:font-size="28pt" fo:language="fr" fo:country="FR" style:font-size-asian="28pt" style:font-size-complex="28pt"/>
    </style:style>
    <style:style style:name="P109" style:family="paragraph">
      <loext:graphic-properties draw:fill="none"/>
      <style:text-properties fo:color="#000000" loext:opacity="100%" style:font-name="Corbel" fo:font-size="26pt" fo:language="fr" fo:country="FR" style:font-size-asian="26pt" style:font-size-complex="26pt"/>
    </style:style>
    <style:style style:name="P110" style:family="paragraph">
      <style:paragraph-properties fo:margin-left="0cm" fo:margin-right="0cm" fo:margin-top="0cm" fo:margin-bottom="0cm" fo:line-height="90%" fo:text-align="lef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1" style:family="paragraph">
      <loext:graphic-properties draw:fill="none"/>
      <style:paragraph-properties fo:margin-left="0cm" fo:margin-right="0cm" fo:margin-top="0cm" fo:margin-bottom="0cm" fo:line-height="90%" fo:text-align="lef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2" style:family="paragraph">
      <style:paragraph-properties fo:margin-left="0cm" fo:margin-right="0cm" fo:margin-top="0cm" fo:margin-bottom="0.346cm" fo:line-height="100%" fo:text-align="left" fo:text-indent="0cm" style:punctuation-wrap="hanging" loext:tab-stop-distance="2.223cm" style:writing-mode="lr-tb">
        <style:tab-stops/>
      </style:paragraph-properties>
      <style:text-properties fo:font-size="13.5pt" fo:language="fr" fo:country="FR" fo:hyphenate="false"/>
    </style:style>
    <style:style style:name="P113" style:family="paragraph">
      <loext:graphic-properties draw:fill="none"/>
      <style:text-properties style:font-name="Corbel" fo:font-size="20pt" fo:language="fr" fo:country="FR" style:font-size-asian="20pt" style:font-size-complex="20pt"/>
    </style:style>
    <style:style style:name="P114" style:family="paragraph">
      <style:paragraph-properties fo:margin-left="0cm" fo:margin-right="0cm" fo:margin-top="0cm" fo:margin-bottom="0.296cm" fo:line-height="90%" fo:text-align="lef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5" style:family="paragraph">
      <loext:graphic-properties draw:fill="solid" draw:fill-color="#f2f2f2"/>
      <style:paragraph-properties fo:margin-left="0cm" fo:margin-right="0cm" fo:margin-top="0cm" fo:margin-bottom="0.296cm" fo:line-height="90%" fo:text-align="lef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6" style:family="paragraph">
      <loext:graphic-properties draw:fill="solid" draw:fill-color="#000000"/>
      <style:paragraph-properties fo:text-align="lef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7" style:family="paragraph">
      <style:paragraph-properties fo:margin-left="0cm" fo:margin-right="0cm" fo:margin-top="0cm" fo:margin-bottom="0.296cm" fo:line-height="90%" fo:text-align="left" fo:text-indent="0cm" style:punctuation-wrap="hanging" loext:tab-stop-distance="0.983cm" style:writing-mode="lr-tb">
        <style:tab-stops/>
      </style:paragraph-properties>
      <style:text-properties fo:font-size="13.5pt" fo:language="fr" fo:country="FR" fo:hyphenate="false"/>
    </style:style>
    <style:style style:name="P118" style:family="paragraph">
      <style:paragraph-properties fo:margin-left="0cm" fo:margin-right="0cm" fo:margin-top="0cm" fo:margin-bottom="0.296cm" fo:line-height="90%" fo:text-align="left" fo:text-indent="0cm" style:punctuation-wrap="hanging" loext:tab-stop-distance="2.223cm" style:writing-mode="lr-tb">
        <style:tab-stops/>
      </style:paragraph-properties>
      <style:text-properties fo:font-size="13.5pt" fo:language="fr" fo:country="FR" fo:hyphenate="false"/>
    </style:style>
    <style:style style:name="P119" style:family="paragraph">
      <loext:graphic-properties draw:fill="solid" draw:fill-color="#f2f2f2"/>
      <style:paragraph-properties fo:margin-left="0cm" fo:margin-right="0cm" fo:margin-top="0cm" fo:margin-bottom="0.296cm" fo:line-height="90%" fo:text-align="lef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20" style:family="paragraph">
      <style:paragraph-properties fo:margin-left="2.249cm" fo:margin-right="0cm" fo:margin-top="0cm" fo:margin-bottom="0.296cm" fo:line-height="90%" fo:text-align="lef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1" style:family="paragraph">
      <style:paragraph-properties fo:margin-left="0cm" fo:margin-right="0cm" fo:margin-top="0cm" fo:margin-bottom="0.296cm" fo:line-height="90%" fo:text-align="lef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2" style:family="paragraph">
      <loext:graphic-properties draw:fill="solid" draw:fill-color="#f2f2f2"/>
      <style:paragraph-properties fo:margin-left="0cm" fo:margin-right="0cm" fo:margin-top="0cm" fo:margin-bottom="0.296cm" fo:line-height="90%" fo:text-align="lef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3" style:family="paragraph">
      <loext:graphic-properties draw:fill="solid" draw:fill-color="#f2f2f2"/>
      <style:paragraph-properties fo:text-align="left"/>
      <style:text-properties fo:font-size="18pt" fo:language="fr" fo:country="FR"/>
    </style:style>
    <style:style style:name="P124"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5"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6"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8"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9" style:family="paragraph">
      <style:paragraph-properties fo:margin-left="0cm" fo:margin-right="0cm" fo:margin-top="0cm" fo:margin-bottom="0.494cm" fo:line-height="90%" fo:text-align="lef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30" style:family="paragraph">
      <loext:graphic-properties draw:fill="solid" draw:fill-color="#ff6600"/>
      <style:paragraph-properties fo:margin-left="0cm" fo:margin-right="0cm" fo:margin-top="0cm" fo:margin-bottom="0.494cm" fo:line-height="90%" fo:text-align="lef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1" style:family="paragraph">
      <style:paragraph-properties fo:margin-left="1.729cm" fo:margin-right="0cm" fo:margin-top="0cm" fo:margin-bottom="0.494cm" fo:line-height="90%" fo:text-align="lef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2" style:family="paragraph">
      <loext:graphic-properties draw:fill="solid" draw:fill-color="#ffc000" draw:opacity="50%"/>
      <style:paragraph-properties fo:margin-left="1.729cm" fo:margin-right="0cm" fo:margin-top="0cm" fo:margin-bottom="0.494cm" fo:line-height="90%" fo:text-align="lef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3"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4"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5"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6"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7" style:family="paragraph">
      <loext:graphic-properties draw:fill="solid" draw:fill-color="#ff6600"/>
      <style:paragraph-properties fo:text-align="lef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8" style:family="paragraph">
      <loext:graphic-properties draw:fill="none" draw:fill-color="#ffffff"/>
      <style:text-properties style:font-name="Corbel" fo:font-size="22pt" style:font-size-asian="22pt" style:font-size-complex="22pt"/>
    </style:style>
    <style:style style:name="P139" style:family="paragraph">
      <style:paragraph-properties fo:margin-left="0cm" fo:margin-right="0cm" fo:margin-top="0.212cm" fo:margin-bottom="0cm" fo:line-height="100%" fo:text-align="left" fo:text-indent="0cm" style:punctuation-wrap="hanging" loext:tab-stop-distance="2.54cm" style:writing-mode="lr-tb">
        <style:tab-stops/>
      </style:paragraph-properties>
      <style:text-properties fo:hyphenate="false"/>
    </style:style>
    <style:style style:name="P140"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112cm" fo:margin-bottom="0.112cm" fo:line-height="100%" fo:text-align="left" fo:text-indent="0cm" style:punctuation-wrap="hanging" loext:tab-stop-distance="2.54cm" style:writing-mode="lr-tb">
        <style:tab-stops/>
      </style:paragraph-properties>
      <style:text-properties fo:hyphenate="false"/>
    </style:style>
    <style:style style:name="P142"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3" style:family="paragraph">
      <loext:graphic-properties draw:fill="none"/>
      <style:paragraph-properties fo:margin-left="0cm" fo:margin-right="0cm" fo:margin-top="0cm" fo:margin-bottom="0cm" fo:line-height="100%" fo:text-align="lef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4" style:family="paragraph">
      <style:paragraph-properties fo:margin-left="0cm" fo:margin-right="0cm" fo:margin-top="0.353cm" fo:margin-bottom="0cm" fo:line-height="110%" fo:text-align="lef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5" style:family="paragraph">
      <loext:graphic-properties draw:fill="none"/>
      <style:paragraph-properties fo:margin-left="0cm" fo:margin-right="0cm" fo:margin-top="0.353cm" fo:margin-bottom="0cm" fo:line-height="110%" fo:text-align="lef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6" style:family="paragraph">
      <style:paragraph-properties fo:line-height="115%"/>
      <style:text-properties fo:language="fr" fo:country="FR"/>
    </style:style>
    <style:style style:name="P147"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8" style:family="paragraph">
      <style:paragraph-properties fo:margin-left="0cm" fo:margin-right="0cm" fo:margin-top="0.42cm" fo:margin-bottom="0.35cm" fo:line-height="100%" fo:text-align="lef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9"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50"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26pt" fo:language="fr" fo:country="FR" style:font-size-asian="26pt" style:font-size-complex="26pt" fo:hyphenate="false" loext:hyphenation-no-caps="false" loext:hyphenation-no-last-word="false"/>
    </style:style>
    <style:style style:name="P151" style:family="paragraph">
      <loext:graphic-properties draw:fill="none"/>
      <style:paragraph-properties fo:margin-left="0cm" fo:margin-right="0cm" fo:margin-top="0cm" fo:margin-bottom="0cm" fo:line-height="90%" fo:text-align="lef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Corbel" fo:font-size="16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9"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10" style:family="text">
      <style:text-properties fo:font-size="28pt" fo:language="fr" fo:country="FR" style:font-size-asian="28pt" style:font-size-complex="28pt"/>
    </style:style>
    <style:style style:name="T11"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orbel" fo:font-size="13.5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9"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20" style:family="text">
      <style:text-properties fo:font-size="24pt" fo:language="fr" fo:country="FR" style:font-size-asian="24pt" style:font-size-complex="24pt"/>
    </style:style>
    <style:style style:name="T21" style:family="text">
      <style:text-properties fo:font-size="24pt" fo:language="fr" fo:country="FR" fo:font-weight="bold" style:font-size-asian="24pt" style:font-weight-asian="bold" style:font-size-complex="24pt" style:font-weight-complex="bold"/>
    </style:style>
    <style:style style:name="T22" style:family="text">
      <style:text-properties style:font-name="Corbel" fo:font-size="12pt" fo:language="fr" fo:country="FR" style:font-size-asian="12pt" style:font-size-complex="12pt"/>
    </style:style>
    <style:style style:name="T23" style:family="text">
      <style:text-properties style:font-name="Corbel" fo:font-size="12pt" fo:language="fr" fo:country="FR" fo:font-style="italic" style:font-size-asian="12pt" style:font-style-asian="italic" style:font-size-complex="12pt" style:font-style-complex="italic"/>
    </style:style>
    <style:style style:name="T24" style:family="text">
      <style:text-properties fo:font-size="10pt" fo:language="fr" fo:country="FR" style:font-size-asian="10pt" style:font-size-complex="10pt"/>
    </style:style>
    <style:style style:name="T25" style:family="text">
      <style:text-properties style:font-name="Corbel" fo:font-size="13pt" fo:language="fr" fo:country="FR" fo:font-style="italic" style:font-size-asian="13pt" style:font-style-asian="italic" style:font-size-complex="13pt" style:font-style-complex="italic"/>
    </style:style>
    <style:style style:name="T26"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style:font-name="Corbel" fo:font-size="14pt" style:font-size-asian="14pt" style:font-size-complex="14pt"/>
    </style:style>
    <style:style style:name="T31" style:family="text">
      <style:text-properties style:font-name="Corbel" fo:font-size="14pt" fo:font-style="italic" style:font-size-asian="14pt" style:font-style-asian="italic" style:font-size-complex="14pt" style:font-style-complex="italic"/>
    </style:style>
    <style:style style:name="T32"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3" style:family="text">
      <style:text-properties fo:font-size="20pt" fo:language="fr" fo:country="FR" fo:font-style="normal" style:font-size-asian="20pt" style:font-style-asian="normal" style:font-size-complex="20pt" style:font-style-complex="normal"/>
    </style:style>
    <style:style style:name="T34"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5" style:family="text">
      <style:text-properties fo:language="fr" fo:country="FR" fo:font-style="normal" style:font-style-asian="normal" style:font-style-complex="normal"/>
    </style:style>
    <style:style style:name="T36" style:family="text">
      <style:text-properties fo:language="fr" fo:country="FR" fo:font-style="normal" fo:font-weight="bold" style:font-style-asian="normal" style:font-weight-asian="bold" style:font-style-complex="normal" style:font-weight-complex="bold"/>
    </style:style>
    <style:style style:name="T37" style:family="text">
      <style:text-properties style:font-name="Corbel" fo:font-size="18pt"/>
    </style:style>
    <style:style style:name="T38"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41"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42" style:family="text">
      <style:text-properties style:font-name="Corbel" fo:font-size="14pt" fo:language="fr" fo:country="FR" style:font-size-asian="14pt" style:font-size-complex="14pt"/>
    </style:style>
    <style:style style:name="T43" style:family="text">
      <style:text-properties style:font-name="Corbel" fo:font-size="14pt" fo:language="fr" fo:country="FR" fo:font-style="italic" style:font-size-asian="14pt" style:font-style-asian="italic" style:font-size-complex="14pt" style:font-style-complex="italic"/>
    </style:style>
    <style:style style:name="T44" style:family="text">
      <style:text-properties fo:color="#666666" loext:opacity="100%" style:font-name="Corbel" fo:font-size="18pt" fo:language="fr" fo:country="FR" fo:font-weight="bold" style:font-size-asian="18pt" style:font-weight-asian="bold" style:font-size-complex="18pt" style:font-weight-complex="bold"/>
    </style:style>
    <style:style style:name="T45"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6" style:family="text">
      <style:text-properties style:font-name="Corbel" fo:font-size="18pt" fo:language="fr" fo:country="FR" style:font-size-asian="18pt" style:font-size-complex="18pt"/>
    </style:style>
    <style:style style:name="T47" style:family="text">
      <style:text-properties style:font-name="Corbel" fo:font-size="18pt" fo:language="fr" fo:country="FR" fo:font-style="normal" style:font-size-asian="18pt" style:font-style-asian="normal" style:font-size-complex="18pt" style:font-style-complex="normal"/>
    </style:style>
    <style:style style:name="T48" style:family="text">
      <style:text-properties style:font-name="Corbel" fo:font-size="18pt" fo:language="fr" fo:country="FR" fo:font-style="italic" style:font-size-asian="18pt" style:font-style-asian="italic" style:font-size-complex="18pt" style:font-style-complex="italic"/>
    </style:style>
    <style:style style:name="T49" style:family="text">
      <style:text-properties style:font-name="Corbel" fo:font-size="18pt" fo:language="fr" fo:country="FR" fo:font-weight="bold" style:font-size-asian="18pt" style:font-weight-asian="bold" style:font-size-complex="18pt" style:font-weight-complex="bold"/>
    </style:style>
    <style:style style:name="T50"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51" style:family="text">
      <style:text-properties style:font-name="Corbel" fo:font-size="18pt" fo:language="fr" fo:country="FR" style:letter-kerning="true" style:font-name-asian="Microsoft YaHei" style:font-size-asian="18pt" style:font-name-complex="Arial1" style:font-size-complex="18pt"/>
    </style:style>
    <style:style style:name="T52"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4"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5" style:family="text">
      <style:text-properties style:font-name="Corbel" fo:font-size="20pt" fo:language="fr" fo:country="FR" style:letter-kerning="true" style:font-name-asian="Microsoft YaHei" style:font-size-asian="20pt" style:font-name-complex="Arial1" style:font-size-complex="20pt"/>
    </style:style>
    <style:style style:name="T56"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7"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8"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9"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3"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5" style:family="text">
      <style:text-properties style:font-name="Corbel" fo:font-size="22pt" fo:language="fr" fo:country="FR" style:font-size-asian="22pt" style:font-size-complex="22pt"/>
    </style:style>
    <style:style style:name="T76" style:family="text">
      <style:text-properties fo:language="fr" fo:country="FR"/>
    </style:style>
    <style:style style:name="T77"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2" style:family="text">
      <style:text-properties style:font-name="Corbel" fo:font-size="22pt" fo:language="fr" fo:country="FR" fo:font-weight="bold" style:font-size-asian="22pt" style:font-weight-asian="bold" style:font-size-complex="22pt" style:font-weight-complex="bold"/>
    </style:style>
    <style:style style:name="T83" style:family="text">
      <style:text-properties fo:font-size="22pt" fo:language="fr" fo:country="FR" style:font-size-asian="22pt" style:font-size-complex="22pt"/>
    </style:style>
    <style:style style:name="T84" style:family="text">
      <style:text-properties fo:font-size="22pt" fo:language="fr" fo:country="FR" fo:font-weight="bold" style:font-size-asian="22pt" style:font-weight-asian="bold" style:font-size-complex="22pt" style:font-weight-complex="bold"/>
    </style:style>
    <style:style style:name="T85"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6" style:family="text">
      <style:text-properties style:font-name="Corbel" fo:font-size="20pt" fo:language="fr" fo:country="FR" style:font-size-asian="20pt" style:font-size-complex="20pt"/>
    </style:style>
    <style:style style:name="T87"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8"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9" style:family="text">
      <style:text-properties fo:font-size="18pt" fo:language="fr" fo:country="FR" style:font-size-asian="18pt" style:font-size-complex="18pt"/>
    </style:style>
    <style:style style:name="T90" style:family="text">
      <style:text-properties fo:color="#666666" loext:opacity="100%" style:font-name="Corbel" fo:font-size="18pt" style:font-size-asian="18pt" style:font-size-complex="18pt"/>
    </style:style>
    <style:style style:name="T91"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2" style:family="text">
      <style:text-properties fo:font-size="24pt" fo:language="fr" fo:country="FR" fo:font-weight="normal" style:font-size-asian="24pt" style:font-weight-asian="normal" style:font-size-complex="24pt" style:font-weight-complex="normal"/>
    </style:style>
    <style:style style:name="T93" style:family="text">
      <style:text-properties style:font-name="Corbel" fo:font-size="20pt" style:font-size-asian="20pt" style:font-size-complex="20pt"/>
    </style:style>
    <style:style style:name="T94" style:family="text">
      <style:text-properties style:font-name="Corbel"/>
    </style:style>
    <style:style style:name="T95"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6"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7"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5"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12" style:family="text">
      <style:text-properties style:font-name="Corbel" fo:font-size="20pt" fo:language="fr" fo:country="FR" fo:font-weight="bold" style:font-size-asian="20pt" style:font-weight-asian="bold" style:font-size-complex="20pt" style:font-weight-complex="bold"/>
    </style:style>
    <style:style style:name="T11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8"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3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4"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5"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7"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8" style:family="text">
      <style:text-properties style:font-name="Corbel" fo:font-size="22pt" style:font-size-asian="22pt" style:font-size-complex="22pt"/>
    </style:style>
    <style:style style:name="T139" style:family="text">
      <style:text-properties style:font-name="Corbel" fo:font-size="22pt" fo:font-weight="bold" style:font-size-asian="22pt" style:font-weight-asian="bold" style:font-size-complex="22pt" style:font-weight-complex="bold"/>
    </style:style>
    <style:style style:name="T140"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5" style:family="text">
      <style:text-properties style:font-name="Corbel" fo:font-size="20pt" fo:language="fr" fo:country="FR" fo:font-style="italic" style:font-size-asian="20pt" style:font-style-asian="italic" style:font-size-complex="20pt" style:font-style-complex="italic"/>
    </style:style>
    <style:style style:name="T146"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1"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52"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3"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8">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8.196cm" presentation:class="subtitle" presentation:user-transformed="true">
          <draw:text-box>
            <text:p text:style-name="P2"><text:span text:style-name="T2">URFIST </text:span></text:p>
            <text:p text:style-name="P2"><text:span text:style-name="T2">Frédérique Flamerie - 2026</text:span></text:p>
            <text:p text:style-name="P2"><text:span text:style-name="T2"/></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364cm" svg:y="12.775cm">
          <draw:image xlink:href="Pictures/100000010000012800000067F42C2B86.png" xlink:type="simple" xlink:show="embed" xlink:actuate="onLoad" draw:mime-type="image/png">
            <text:p/>
          </draw:image>
        </draw:frame>
        <draw:custom-shape draw:name="ZoneTexte 5" draw:style-name="gr3" draw:text-style-name="P7" draw:layer="layout" svg:width="20.707cm" svg:height="0.822cm" svg:x="3.8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4" draw:text-style-name="P9" draw:layer="layout" svg:width="23.769cm" svg:height="0.928cm" svg:x="1.164cm" svg:y="11.062cm">
          <office:event-listeners>
            <presentation:event-listener script:event-name="dom:click" presentation:action="show" xlink:href="https://creativecommons.org/licenses/by-sa/4.0/deed.fr" xlink:type="simple" xlink:show="embed" xlink:actuate="onRequest"/>
          </office:event-listeners>
          <text:p text:style-name="P8"><text:span text:style-name="T4">🔗 </text:span><text:span text:style-name="T5">Télécharger </text:span><text:span text:style-name="T5"><text:a xlink:href="https://github.com/fflamerie/intro_revlit" xlink:type="simple">ce diaporama et les fiches associées</text:a></text:span><text:span text:style-name="T5"><text:s/></text:span><text:span text:style-name="T4"><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5" draw:layer="layout" svg:width="19.798cm" svg:height="11.136cm" svg:x="0.6cm" svg:y="2.257cm" draw:page-number="1" presentation:class="page"/>
          <draw:frame draw:name="Espace réservé des commentaires 2" presentation:style-name="pr3"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4" draw:layer="layout" svg:width="21.907cm" svg:height="2.761cm" svg:x="0.6cm" svg:y="0.318cm" presentation:class="title" presentation:user-transformed="true">
          <draw:text-box>
            <text:p text:style-name="P13"><text:span text:style-name="T7">Objectifs</text:span></text:p>
          </draw:text-box>
        </draw:frame>
        <draw:frame draw:name="Espace réservé du contenu 2" presentation:style-name="pr6" draw:text-style-name="P16" draw:layer="layout" svg:width="23.965cm" svg:height="11.003cm" svg:x="0.792cm" svg:y="3.57cm" presentation:class="outline" presentation:user-transformed="true">
          <draw:text-box>
            <text:list text:style-name="L4">
              <text:list-item>
                <text:p text:style-name="P15"><text:span text:style-name="T8">Distinguer les différents types de revue de littérature et leurs exigences méthodologiques</text:span></text:p>
              </text:list-item>
              <text:list-item>
                <text:p text:style-name="P15"><text:span text:style-name="T8">Mettre en œuvre les étapes bibliographiques d’une revue de littérature </text:span></text:p>
              </text:list-item>
              <text:list-item>
                <text:p text:style-name="P15"><text:span text:style-name="T8">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5" draw:layer="layout" svg:width="0.001cm" svg:height="0.001cm" svg:x="0cm" svg:y="2.257cm" draw:page-number="2" presentation:class="page"/>
          <draw:frame draw:name="Espace réservé des commentaires 2" presentation:style-name="pr7"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8" draw:layer="layout" svg:width="21.907cm" svg:height="1.533cm" svg:x="1.566cm" svg:y="0.633cm" presentation:class="title" presentation:user-transformed="true">
          <draw:text-box>
            <text:p text:style-name="P17"><text:span text:style-name="T9">Programme</text:span></text:p>
          </draw:text-box>
        </draw:frame>
        <draw:frame presentation:style-name="pr10" draw:text-style-name="P20" draw:layer="layout" svg:width="23.055cm" svg:height="11.959cm" svg:x="1.214cm" svg:y="3.35cm" presentation:class="outline" presentation:user-transformed="true">
          <draw:text-box>
            <text:list text:style-name="L6">
              <text:list-item>
                <text:p text:style-name="P19"><text:span text:style-name="T10">Panorama des revues de littérature </text:span></text:p>
              </text:list-item>
            </text:list>
            <text:list text:style-name="L7">
              <text:list-item>
                <text:p text:style-name="P19"><text:span text:style-name="T10">Choix des modes de recherche bibliographique</text:span></text:p>
              </text:list-item>
              <text:list-item>
                <text:p text:style-name="P19"><text:span text:style-name="T10">Choix des outils de recherche bibliographique</text:span></text:p>
              </text:list-item>
              <text:list-item>
                <text:p text:style-name="P19"><text:span text:style-name="T10">Construction d’une équation de recherche complexe</text:span></text:p>
              </text:list-item>
              <text:list-item>
                <text:p text:style-name="P19"><text:span text:style-name="T10">Constitution et gestion du corpus de références bibliographiques et de fichiers de texte intégral</text:span></text:p>
              </text:list-item>
            </text:list>
          </draw:text-box>
        </draw:frame>
        <presentation:notes draw:style-name="dp4">
          <draw:page-thumbnail draw:style-name="gr5" draw:layer="layout" svg:width="0.001cm" svg:height="0.001cm" svg:x="0cm" svg:y="2.257cm" draw:page-number="3" presentation:class="page"/>
          <draw:frame presentation:style-name="pr11" draw:text-style-name="P21" draw:layer="layout" svg:width="16.799cm" svg:height="13.364cm" svg:x="2.1cm" svg:y="14.107cm" presentation:class="notes" presentation:placeholder="true">
            <draw:text-box/>
          </draw:frame>
        </presentation:notes>
      </draw:page>
      <draw:page draw:name="page4" draw:style-name="dp3" draw:master-page-name="Titre_20_et_20_contenu_5f_" presentation:presentation-page-layout-name="AL2T11" presentation:use-footer-name="ftr1">
        <office:forms form:automatic-focus="false" form:apply-design-mode="false"/>
        <draw:frame draw:name="Titre 31" presentation:style-name="pr12" draw:text-style-name="P22" draw:layer="layout" svg:width="15.05cm" svg:height="2.761cm" svg:x="0.623cm" svg:y="0.66cm" presentation:class="title" presentation:user-transformed="true">
          <draw:text-box>
            <text:p text:style-name="P13"><text:span text:style-name="T7">Pas au programme : ChatGPT</text:span></text:p>
          </draw:text-box>
        </draw:frame>
        <draw:custom-shape draw:name="ZoneTexte 25" draw:style-name="gr6" draw:text-style-name="P7" draw:layer="layout" svg:width="14.301cm" svg:height="6.347cm" svg:x="0.806cm" svg:y="4.516cm">
          <text:p text:style-name="P23"><text:span text:style-name="T11">Should you use ChatGPT to generate your systematic or scoping review search strategy? </text:span></text:p>
          <text:list text:style-name="L9">
            <text:list-item>
              <text:p text:style-name="P23"><text:span text:style-name="T11">cannot create reproducible search strategies </text:span></text:p>
            </text:list-item>
            <text:list-item>
              <text:p text:style-name="P23"><text:span text:style-name="T11">can potentially generate queries with acceptable precision but unacceptable recall</text:span></text:p>
            </text:list-item>
            <text:list-item>
              <text:p text:style-name="P23"><text:span text:style-name="T11">search strategies produced are often messy with very poor face validity</text:span></text:p>
            </text:list-item>
          </text:list>
          <text:p text:style-name="P2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7" draw:text-style-name="P24" draw:layer="layout" svg:width="14.613cm" svg:height="1.773cm" svg:x="0.731cm" svg:y="12.008cm">
          <text:p text:style-name="P23"><text:span text:style-name="T13">Source : Nekolaichuk, E. (2026, janvier 8). </text:span><text:span text:style-name="T14">Can ChatGPT write a comprehensive search strategy?</text:span><text:span text:style-name="T13"> A Guide to Comprehensive Searching in the Health Sciences. </text:span><text:span text:style-name="T15"><text:a xlink:href="https://guides.library.utoronto.ca/c.php?g=577919&amp;p=5332074" xlink:type="simple">https</text:a></text:span><text:span text:style-name="T15"><text:a xlink:href="https://guides.library.utoronto.ca/c.php?g=577919&amp;p=5332074" xlink:type="simple">://</text:a></text:span><text:span text:style-name="T15"><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13" draw:style-name="gr8"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5" draw:layer="layout" svg:width="0.001cm" svg:height="0.001cm" svg:x="0cm" svg:y="2.257cm" draw:page-number="4" presentation:class="page"/>
          <draw:frame presentation:style-name="pr13" draw:text-style-name="P25"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2" draw:layer="layout" svg:width="23.55cm" svg:height="2.761cm" svg:x="0.623cm" svg:y="-0.2cm" presentation:class="title" presentation:user-transformed="true">
          <draw:text-box>
            <text:p text:style-name="P13"><text:span text:style-name="T7">Pas au programme : autres IA</text:span></text:p>
          </draw:text-box>
        </draw:frame>
        <draw:custom-shape draw:name="ZoneTexte 23" draw:style-name="gr9" draw:text-style-name="P26" draw:layer="layout" svg:width="25.066cm" svg:height="1.838cm" svg:x="0.334cm" svg:y="12.825cm">
          <text:p text:style-name="P23"><text:span text:style-name="T13">Source : Tay, A. (2026, février 12). Are AI Tools Killing Review Articles? Two Failure Modes Suggest Otherwise. </text:span><text:span text:style-name="T14">Aaron Tay’s Musings about Librarianship</text:span><text:span text:style-name="T13">. </text:span><text:span text:style-name="T13"><text:a xlink:href="https://aarontay.substack.com/p/are-ai-tools-killing-review-articles" xlink:type="simple">https://aarontay.substack.com/p/are-ai-tools-killing-review-articles</text:a></text:span></text:p>
          <text:p text:style-name="P2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959cm" svg:height="10.58cm" svg:x="2.747cm" svg:y="2.074cm">
          <draw:image xlink:href="Pictures/1000000000000AC0000006005D268AB7.jpg" xlink:type="simple" xlink:show="embed" xlink:actuate="onLoad" draw:mime-type="image/jpeg">
            <text:p/>
          </draw:image>
        </draw:frame>
        <presentation:notes draw:style-name="dp5">
          <draw:page-thumbnail draw:style-name="gr5" draw:layer="layout" svg:width="0.001cm" svg:height="0.001cm" svg:x="0cm" svg:y="2.257cm" draw:page-number="5" presentation:class="page"/>
          <draw:frame presentation:style-name="pr13" draw:text-style-name="P25" draw:layer="layout" svg:width="16.799cm" svg:height="13.364cm" svg:x="2.1cm" svg:y="14.107cm" presentation:class="notes" presentation:placeholder="true">
            <draw:text-box/>
          </draw:frame>
        </presentation:notes>
      </draw:page>
      <draw:page draw:name="page6" draw:style-name="dp3" draw:master-page-name="Titre_20_et_20_contenu_5f_" presentation:presentation-page-layout-name="AL2T11" presentation:use-footer-name="ftr1">
        <office:forms form:automatic-focus="false" form:apply-design-mode="false"/>
        <draw:frame draw:name="Titre 37" presentation:style-name="pr12" draw:text-style-name="P22" draw:layer="layout" svg:width="24.335cm" svg:height="2.761cm" svg:x="0.506cm" svg:y="-0.132cm" presentation:class="title" presentation:user-transformed="true">
          <draw:text-box>
            <text:p text:style-name="P13"><text:span text:style-name="T7">Pas (trop) au programme : IA </text:span></text:p>
          </draw:text-box>
        </draw:frame>
        <draw:custom-shape draw:name="ZoneTexte 15" draw:style-name="gr11" draw:text-style-name="P29" draw:layer="layout" svg:width="21.885cm" svg:height="1.353cm" svg:x="1.612cm" svg:y="12.934cm">
          <text:p text:style-name="P28"><text:span text:style-name="T17">Source : Rempel, H. (2026, avril 23). </text:span><text:span text:style-name="T18">Generative AI Tools for Literature Reviews</text:span><text:span text:style-name="T17">. LibGuides at Oregon State University. </text:span><text:span text:style-name="T17"><text:a xlink:href="https://guides.library.oregonstate.edu/c.php?g=1421175&amp;p=10536219" xlink:type="simple">https://guides.library.oregonstate.edu/c.php?g=1421175&amp;p=10536219</text:a></text:span><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5.146cm" svg:height="10.33cm" svg:x="3.736cm" svg:y="2.304cm">
          <draw:image xlink:href="Pictures/100000010000029F0000021023B0EFEE.png" xlink:type="simple" xlink:show="embed" xlink:actuate="onLoad" draw:mime-type="image/png">
            <text:p/>
          </draw:image>
        </draw:frame>
        <presentation:notes draw:style-name="dp5">
          <draw:page-thumbnail draw:style-name="gr5" draw:layer="layout" svg:width="0.001cm" svg:height="0.001cm" svg:x="0cm" svg:y="2.257cm" draw:page-number="6" presentation:class="page"/>
          <draw:frame presentation:style-name="pr13" draw:text-style-name="P25"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32" draw:layer="layout" svg:width="21.907cm" svg:height="5.942cm" svg:x="1.729cm" svg:y="3.559cm" presentation:class="title" presentation:user-transformed="true">
          <draw:text-box>
            <text:p text:style-name="P31"><text:span text:style-name="T1">Panorama des revues de littérature</text:span></text:p>
          </draw:text-box>
        </draw:frame>
        <draw:frame draw:name="Espace réservé du texte 7" presentation:style-name="pr15" draw:text-style-name="P33" draw:layer="layout" svg:width="21.907cm" svg:height="4.44cm" svg:x="1.729cm" svg:y="9.259cm" presentation:class="outline" presentation:user-transformed="true">
          <draw:text-box>
            <text:p text:style-name="P2"><text:span text:style-name="T19">Contexte</text:span></text:p>
            <text:p text:style-name="P2"><text:span text:style-name="T19">Vue d’ensemble</text:span></text:p>
            <text:p text:style-name="P2"><text:span text:style-name="T19">Typologie des revues de littérature</text:span></text:p>
            <text:p text:style-name="P2"><text:span text:style-name="T19">Cadres méthodologiques</text:span></text:p>
          </draw:text-box>
        </draw:frame>
        <draw:g draw:name="Keywords" draw:style-name="gr13">
          <draw:custom-shape draw:name="Rectangle 1"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7" presentation:class="page"/>
          <draw:frame draw:name="Espace réservé des commentaires 2" presentation:style-name="pr16"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2" presentation:style-name="pr12" draw:text-style-name="P14" draw:layer="layout" svg:width="21.907cm" svg:height="2.761cm" svg:x="0.437cm" svg:y="0.238cm" presentation:class="title" presentation:user-transformed="true">
          <draw:text-box>
            <text:p text:style-name="P13"><text:span text:style-name="T7">Contexte</text:span></text:p>
          </draw:text-box>
        </draw:frame>
        <draw:frame presentation:style-name="pr18" draw:text-style-name="P37" draw:layer="layout" svg:width="23.055cm" svg:height="11.251cm" svg:x="0.999cm" svg:y="3.248cm" presentation:class="outline" presentation:user-transformed="true">
          <draw:text-box>
            <text:list text:style-name="L7">
              <text:list-item>
                <text:p text:style-name="P35"><text:span text:style-name="T20">Revues systématiques pratiquées dans un nombre croissant de domaines en plus de la santé</text:span></text:p>
              </text:list-item>
              <text:list-item>
                <text:p text:style-name="P36"><text:span text:style-name="T20">Importance croissante des standards du type PRISMA</text:span></text:p>
              </text:list-item>
              <text:list-item>
                <text:p text:style-name="P35"><text:span text:style-name="T20">Nombre croissant et évolution rapide des outils de recherche et de découverte</text:span></text:p>
              </text:list-item>
              <text:list-item>
                <text:p text:style-name="P35"><text:span text:style-name="T20">Recherches à mener dans un nombre croissant de façon exponentielle de publications</text:span></text:p>
                <text:list>
                  <text:list-item>
                    <text:p text:style-name="P35"><text:span text:style-name="T20">En 1982, on dénombrait</text:span><text:span text:style-name="T21"> 13,7 millions</text:span><text:span text:style-name="T20"> d’articles disponibles ; c’est le nombre d’articles publiés en 4 ans aujourd’hui !</text:span></text:p>
                  </text:list-item>
                </text:list>
                <text:p><text:span text:style-name="T20"/></text:p>
              </text:list-item>
            </text:list>
          </draw:text-box>
        </draw:frame>
        <presentation:notes draw:style-name="dp4">
          <draw:page-thumbnail draw:name="Espace réservé de l'image des diapositives 2" draw:style-name="gr5" draw:layer="layout" svg:width="0.001cm" svg:height="0.001cm" svg:x="0cm" svg:y="2.257cm" draw:page-number="8" presentation:class="page"/>
          <draw:frame draw:name="Espace réservé des commentaires 11" presentation:style-name="pr19" draw:text-style-name="P10"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4" presentation:style-name="pr12" draw:text-style-name="P14" draw:layer="layout" svg:width="21.907cm" svg:height="2.761cm" svg:x="0.437cm" svg:y="-0.111cm" presentation:class="title" presentation:user-transformed="true">
          <draw:text-box>
            <text:p text:style-name="P13"><text:span text:style-name="T7">Contexte </text:span></text:p>
          </draw:text-box>
        </draw:frame>
        <draw:custom-shape draw:name="Rectangle 130" draw:style-name="gr25" draw:text-style-name="P7" draw:layer="layout" svg:width="24.114cm" svg:height="1.267cm" svg:x="0.225cm" svg:y="12.533cm">
          <text:p text:style-name="P6"><text:span text:style-name="T22">Source : Gusenbauer, M. (2021). The age of abundant scholarly information and its synthesis– A time when ‘just google it’ is no longer enough. </text:span><text:span text:style-name="T23">Research Synthesis Methods</text:span><text:span text:style-name="T22">, </text:span><text:span text:style-name="T23">12</text:span><text:span text:style-name="T22">(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0" draw:layer="layout" svg:width="18.499cm" svg:height="10.014cm" svg:x="3.699cm" svg:y="2.3cm">
          <draw:image xlink:href="Pictures/1000000000000850000004807360CB59.jpg" xlink:type="simple" xlink:show="embed" xlink:actuate="onLoad" draw:mime-type="image/jpeg">
            <text:p/>
          </draw:image>
        </draw:frame>
        <draw:frame draw:style-name="gr27" draw:text-style-name="P40" draw:layer="layout" svg:width="14.399cm" svg:height="3.69cm" svg:x="8.198cm" svg:y="-0.632cm">
          <draw:text-box>
            <text:p text:style-name="P38"><text:span text:style-name="T24"/></text:p>
            <text:p text:style-name="P39"><text:span text:style-name="T25">Croissance exponentielle du nombre de notices de publications scientifiques dans les principaux systèmes de recherche (entre 1900 et 2017)</text:span></text:p>
            <text:p text:style-name="P38"><text:span text:style-name="T24"/></text:p>
          </draw:text-box>
        </draw:frame>
        <presentation:notes draw:style-name="dp4">
          <draw:page-thumbnail draw:name="Espace réservé de l'image des diapositives 13" draw:style-name="gr5" draw:layer="layout" svg:width="0.001cm" svg:height="0.001cm" svg:x="0cm" svg:y="2.257cm" draw:page-number="9" presentation:class="page"/>
          <draw:frame draw:name="Espace réservé des commentaires 1" presentation:style-name="pr21" draw:text-style-name="P10"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5" presentation:style-name="pr12" draw:text-style-name="P14" draw:layer="layout" svg:width="21.907cm" svg:height="2.761cm" svg:x="0.437cm" svg:y="-0.011cm" presentation:class="title" presentation:user-transformed="true">
          <draw:text-box>
            <text:p text:style-name="P13"><text:span text:style-name="T7">Contexte </text:span></text:p>
          </draw:text-box>
        </draw:frame>
        <draw:custom-shape draw:name="Rectangle 132" draw:style-name="gr28" draw:text-style-name="P7" draw:layer="layout" svg:width="24.114cm" svg:height="1.267cm" svg:x="0.225cm" svg:y="12.492cm">
          <text:p text:style-name="P6"><text:span text:style-name="T22">Source : Gusenbauer, M. (2021). The age of abundant scholarly information and its synthesis– A time when ‘just google it’ is no longer enough. </text:span><text:span text:style-name="T23">Research Synthesis Methods</text:span><text:span text:style-name="T22">, </text:span><text:span text:style-name="T23">12</text:span><text:span text:style-name="T22">(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23cm" svg:height="9.781cm" svg:x="0.499cm" svg:y="2.5cm">
          <draw:image xlink:href="Pictures/100000000000085000000389E532B103.jpg" xlink:type="simple" xlink:show="embed" xlink:actuate="onLoad" draw:mime-type="image/jpeg">
            <text:p/>
          </draw:image>
        </draw:frame>
        <draw:frame draw:style-name="gr29" draw:text-style-name="P42" draw:layer="layout" svg:width="11.578cm" svg:height="1.674cm" svg:x="11.999cm" svg:y="0.699cm">
          <draw:text-box>
            <text:p text:style-name="P41"><text:span text:style-name="T25">Essor des revues systématiques et des méta-analyses depuis les années 1970 (1900-2020, échelle logarithmique)</text:span></text:p>
          </draw:text-box>
        </draw:frame>
        <presentation:notes draw:style-name="dp4">
          <draw:page-thumbnail draw:name="Espace réservé de l'image des diapositives 14" draw:style-name="gr5" draw:layer="layout" svg:width="0.001cm" svg:height="0.001cm" svg:x="0cm" svg:y="2.257cm" draw:page-number="10" presentation:class="page"/>
          <draw:frame draw:name="Espace réservé des commentaires 12" presentation:style-name="pr23" draw:text-style-name="P10"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10" draw:text-style-name="P27"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3" draw:layer="layout" svg:width="7.698cm" svg:height="2.761cm" svg:x="0.209cm" svg:y="0.935cm" presentation:class="title" presentation:user-transformed="true">
          <draw:text-box>
            <text:p text:style-name="P13"><text:span text:style-name="T26">Vue d’ensemble</text:span></text:p>
          </draw:text-box>
        </draw:frame>
        <draw:frame draw:style-name="gr30" draw:text-style-name="P44" draw:layer="layout" svg:width="6.115cm" svg:height="6.863cm" svg:x="0.332cm" svg:y="7.573cm">
          <draw:text-box>
            <text:p><text:span text:style-name="T27">Source : van Essen, K., Akse, M., Pelgrim, T., Prick, A.-E., &amp; Aalbers, S. (2025). Therapeutic factors and mechanisms of change in music therapy for people with late-life depression : A scoping review.</text:span><text:span text:style-name="T28"> The Arts in Psychotherapy, 93</text:span><text:span text:style-name="T27">, 102289. </text:span><text:span text:style-name="T29"><text:a xlink:href="https://doi.org/10.1016/j.aip.2025.102289" xlink:type="simple">https://doi.org/10.1016/j.aip.2025.102289</text:a></text:span><text:span text:style-name="T27"><text:s/></text:span></text:p>
          </draw:text-box>
        </draw:frame>
        <presentation:notes draw:style-name="dp4">
          <draw:page-thumbnail draw:name="Espace réservé de l'image des diapositives 18" draw:style-name="gr5" draw:layer="layout" svg:width="0.001cm" svg:height="0.001cm" svg:x="0cm" svg:y="2.257cm" draw:page-number="11" presentation:class="page"/>
          <draw:frame draw:name="Espace réservé des commentaires 16" presentation:style-name="pr25" draw:text-style-name="P10"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style-name="gr10" draw:text-style-name="P27" draw:layer="layout" svg:width="23.133cm" svg:height="14.287cm" svg:x="0.399cm" svg:y="0cm">
          <draw:image xlink:href="Pictures/10000001000007600000048E00FB3486.png" xlink:type="simple" xlink:show="embed" xlink:actuate="onLoad" draw:mime-type="image/png">
            <text:p/>
          </draw:image>
        </draw:frame>
        <draw:frame draw:name="Titre 16" presentation:style-name="pr27" draw:text-style-name="P43" draw:layer="layout" svg:width="8.682cm" svg:height="2.761cm" svg:x="15.984cm" svg:y="5.66cm" presentation:class="title" presentation:user-transformed="true">
          <draw:text-box>
            <text:p text:style-name="P45"><text:span text:style-name="T26">Vue d’ensemble</text:span></text:p>
          </draw:text-box>
        </draw:frame>
        <presentation:notes draw:style-name="dp4">
          <draw:page-thumbnail draw:name="Espace réservé de l'image des diapositives 15" draw:style-name="gr5" draw:layer="layout" svg:width="0.001cm" svg:height="0.001cm" svg:x="0cm" svg:y="2.257cm" draw:page-number="12" presentation:class="page"/>
          <draw:frame draw:name="Espace réservé des commentaires 13" presentation:style-name="pr28" draw:text-style-name="P10"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9" presentation:style-name="pr12" draw:text-style-name="P46" draw:layer="layout" svg:width="13.256cm" svg:height="4.761cm" svg:x="0.467cm" svg:y="0.459cm" presentation:class="title" presentation:user-transformed="true">
          <draw:text-box>
            <text:p text:style-name="P13"><text:span text:style-name="T7">Que pensez-vous de ce diagramme de flux ?</text:span></text:p>
          </draw:text-box>
        </draw:frame>
        <draw:frame draw:style-name="gr31" draw:text-style-name="P27" draw:layer="layout" svg:width="9.779cm" svg:height="13.573cm" svg:x="14.719cm" svg:y="0.299cm">
          <draw:image xlink:href="Pictures/10000000000004C9000006A45C59C0B2.jpg" xlink:type="simple" xlink:show="embed" xlink:actuate="onLoad" draw:mime-type="image/jpeg">
            <text:p/>
          </draw:image>
        </draw:frame>
        <draw:frame draw:style-name="gr32" draw:text-style-name="P48" draw:layer="layout" svg:width="12.874cm" svg:height="3.096cm" svg:x="0.625cm" svg:y="10.499cm">
          <draw:text-box>
            <text:p text:style-name="P47"><text:span text:style-name="T30">Source : Haghighi, E., Kasraei, A., Famurewa, S., Strandberg, G., Sas, G., &amp; Garmabaki, A. H. S. (2025). Climate change risks on railway infrastructure : A systematic review and analysis. </text:span><text:span text:style-name="T31">Sustainable Cities and Society, 129</text:span><text:span text:style-name="T30">, 106504. </text:span><text:span text:style-name="T30"><text:a xlink:href="https://doi.org/10.1016/j.scs.2025.106504" xlink:type="simple">https://doi.org/10.1016/j.scs.2025.106504</text:a></text:span><text:span text:style-name="T30"><text:s/></text:span></text:p>
          </draw:text-box>
        </draw:frame>
        <presentation:notes draw:style-name="dp4">
          <draw:page-thumbnail draw:name="Espace réservé de l'image des diapositives 61" draw:style-name="gr5" draw:layer="layout" svg:width="0.001cm" svg:height="0.001cm" svg:x="0cm" svg:y="2.257cm" draw:page-number="13" presentation:class="page"/>
          <draw:frame draw:name="Espace réservé des commentaires 44" presentation:style-name="pr30" draw:text-style-name="P10"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57" presentation:style-name="pr12" draw:text-style-name="P46" draw:layer="layout" svg:width="24.255cm" svg:height="2.761cm" svg:x="0.437cm" svg:y="-0.011cm" presentation:class="title" presentation:user-transformed="true">
          <draw:text-box>
            <text:p text:style-name="P13"><text:span text:style-name="T7">Typologie des revues de littérature</text:span></text:p>
          </draw:text-box>
        </draw:frame>
        <draw:frame presentation:style-name="pr32" draw:text-style-name="P49" draw:layer="layout" svg:width="23.055cm" svg:height="1cm" svg:x="1.352cm" svg:y="13.797cm" presentation:class="outline" presentation:user-transformed="true">
          <draw:text-box>
            <text:list text:style-name="L11">
              <text:list-item>
                <text:p><text:span text:style-name="T32"><text:a xlink:href="https://github.com/fflamerie/intro_revlit/blob/main/docs/Typologie_RevLit.pdf" xlink:type="simple">Au format PDF dimensions A4</text:a></text:span></text:p>
              </text:list-item>
            </text:list>
          </draw:text-box>
        </draw:frame>
        <draw:frame draw:style-name="gr33" draw:text-style-name="P27" draw:layer="layout" svg:width="23.025cm" svg:height="11.335cm" svg:x="0.81cm" svg:y="2.282cm">
          <draw:image xlink:href="Pictures/100000010000045B00000225A813FADA.png" xlink:type="simple" xlink:show="embed" xlink:actuate="onLoad" draw:mime-type="image/png">
            <text:p/>
          </draw:image>
        </draw:frame>
        <presentation:notes draw:style-name="dp4">
          <draw:page-thumbnail draw:name="Espace réservé de l'image des diapositives 59" draw:style-name="gr5" draw:layer="layout" svg:width="0.001cm" svg:height="0.001cm" svg:x="0cm" svg:y="2.257cm" draw:page-number="14" presentation:class="page"/>
          <draw:frame draw:name="Espace réservé des commentaires 42" presentation:style-name="pr33" draw:text-style-name="P10"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5" draw:style-name="dp3" draw:master-page-name="Titre_20_et_20_contenu_5f_" presentation:presentation-page-layout-name="AL4T3" presentation:use-footer-name="ftr1">
        <office:forms form:automatic-focus="false" form:apply-design-mode="false"/>
        <draw:frame draw:name="Titre 18" presentation:style-name="pr12" draw:text-style-name="P14" draw:layer="layout" svg:width="24.291cm" svg:height="2.761cm" svg:x="0.686cm" svg:y="-0.133cm" presentation:class="title" presentation:user-transformed="true">
          <draw:text-box>
            <text:p text:style-name="P13"><text:span text:style-name="T7">Typologie des revues de littérature</text:span></text:p>
          </draw:text-box>
        </draw:frame>
        <draw:frame presentation:style-name="pr35" draw:text-style-name="P37" draw:layer="layout" svg:width="11.69cm" svg:height="9.761cm" svg:x="13.108cm" svg:y="2.924cm" presentation:class="outline" presentation:user-transformed="true">
          <draw:text-box>
            <text:list text:style-name="L12">
              <text:list-header>
                <text:p text:style-name="P35"><text:span text:style-name="T21">Revue systématique</text:span><text:span text:style-name="T20"> </text:span></text:p>
              </text:list-header>
            </text:list>
            <text:list text:style-name="L13">
              <text:list-item>
                <text:p text:style-name="P35"><text:span text:style-name="T33">Vise l’</text:span><text:span text:style-name="T34">exhaustivité</text:span><text:span text:style-name="T33">, l’</text:span><text:span text:style-name="T34">exactitude</text:span><text:span text:style-name="T33"> et la </text:span><text:span text:style-name="T34">précision</text:span><text:span text:style-name="T33">, la </text:span><text:span text:style-name="T34">transparence</text:span><text:span text:style-name="T33"> et la </text:span><text:span text:style-name="T34">réplicabilité</text:span></text:p>
              </text:list-item>
              <text:list-item>
                <text:p text:style-name="P35"><text:span text:style-name="T33">Vise à minimiser les </text:span><text:span text:style-name="T34">biais</text:span></text:p>
              </text:list-item>
              <text:list-item>
                <text:p text:style-name="P35"><text:span text:style-name="T33">Doit être une évaluation fiable des </text:span><text:span text:style-name="T34">données probantes</text:span></text:p>
              </text:list-item>
              <text:list-item>
                <text:p text:style-name="P35"><text:span text:style-name="T33">Garantit une </text:span><text:span text:style-name="T34">évaluation de la valeur</text:span><text:span text:style-name="T33"> des études incluses</text:span></text:p>
              </text:list-item>
            </text:list>
          </draw:text-box>
        </draw:frame>
        <draw:frame presentation:style-name="pr36" draw:text-style-name="P50" draw:layer="layout" svg:width="11.591cm" svg:height="7cm" svg:x="0.408cm" svg:y="3.038cm" presentation:class="outline" presentation:user-transformed="true">
          <draw:text-box>
            <text:list text:style-name="L13">
              <text:list-header>
                <text:p><text:span text:style-name="T21">Revue narrative</text:span></text:p>
              </text:list-header>
              <text:list-item>
                <text:p><text:span text:style-name="T35">Ne vise pas l’</text:span><text:span text:style-name="T36">exhaustivité</text:span><text:span text:style-name="T35">, la </text:span><text:span text:style-name="T36">précision</text:span><text:span text:style-name="T35">, la <text:s/></text:span><text:span text:style-name="T36">transparence</text:span><text:span text:style-name="T35"> ni la </text:span><text:span text:style-name="T36">réplicabilité</text:span></text:p>
              </text:list-item>
              <text:list-item>
                <text:p><text:span text:style-name="T35">Ne vise pas l’absence de </text:span><text:span text:style-name="T36">biais</text:span></text:p>
              </text:list-item>
              <text:list-item>
                <text:p><text:span text:style-name="T35">Peut être fondée sur l’</text:span><text:span text:style-name="T36">opinion</text:span><text:span text:style-name="T35">, l’expérience, une forme d’évaluation de la littérature</text:span></text:p>
              </text:list-item>
            </text:list>
          </draw:text-box>
        </draw:frame>
        <draw:line draw:style-name="gr34" draw:text-style-name="P30" draw:layer="layout" svg:x1="12.298cm" svg:y1="2.5cm" svg:x2="12.298cm" svg:y2="12.148cm">
          <text:p/>
        </draw:line>
        <draw:frame draw:style-name="gr35" draw:text-style-name="P51" draw:layer="layout" svg:width="25.4cm" svg:height="1.783cm" svg:x="0.099cm" svg:y="12.916cm">
          <draw:text-box>
            <text:p><text:span text:style-name="T22">Source : Haddaway, N. R., Lotfi, T., &amp; Mbuagbaw, L. (2022). Systematic reviews : A glossary for public health. </text:span><text:span text:style-name="T23">Scandinavian Journal of Public Health</text:span><text:span text:style-name="T22">, </text:span><text:span text:style-name="T23">51</text:span><text:span text:style-name="T22">(1), 1‑10. </text:span><text:span text:style-name="T22"><text:a xlink:href="https://doi.org/10.1177/14034948221074998" xlink:type="simple">https://doi.org/10.1177/14034948221074998</text:a></text:span><text:span text:style-name="T22"><text:s/></text:span></text:p>
          </draw:text-box>
        </draw:frame>
        <draw:frame draw:style-name="gr36" draw:text-style-name="P52" draw:layer="layout" svg:width="8cm" svg:height="2.1cm" svg:x="1.998cm" svg:y="10.199cm">
          <draw:text-box>
            <text:p><text:span text:style-name="T37"><text:s/>💡A quels biais pensez-vous dans ce contexte ?</text:span></text:p>
          </draw:text-box>
        </draw:frame>
        <presentation:notes draw:style-name="dp4">
          <draw:page-thumbnail draw:name="Espace réservé de l'image des diapositives 17" draw:style-name="gr5" draw:layer="layout" svg:width="0.001cm" svg:height="0.001cm" svg:x="0cm" svg:y="2.257cm" draw:page-number="15" presentation:class="page"/>
          <draw:frame draw:name="Espace réservé des commentaires 15" presentation:style-name="pr37" draw:text-style-name="P10"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7" draw:text-style-name="P54" draw:layer="layout" svg:width="23.5cm" svg:height="8.984cm" svg:x="0.999cm" svg:y="3.434cm">
          <draw:text-box>
            <text:list text:style-name="L14">
              <text:list-item>
                <text:p text:style-name="P53"><text:span text:style-name="T38"><text:s/>Le </text:span><text:span text:style-name="T39">protocole</text:span><text:span text:style-name="T38"> est revu par les pairs et publié.</text:span></text:p>
              </text:list-item>
              <text:list-item>
                <text:p text:style-name="P53"><text:span text:style-name="T38"><text:s/>Les recherches sont menées dans </text:span><text:span text:style-name="T39">plusieurs bases de données et sources de littérature grise</text:span><text:span text:style-name="T38">, selon les équations définies dans le protocole.</text:span></text:p>
              </text:list-item>
              <text:list-item>
                <text:p text:style-name="P53"><text:span text:style-name="T38"><text:s/>Tous les résultats sont analysés selon des </text:span><text:span text:style-name="T39">critères d’inclusion prédéfinis</text:span><text:span text:style-name="T38">, en suivant un degré de précision croissante (tri sur titre/résumé, puis sur texte intégral).</text:span></text:p>
              </text:list-item>
              <text:list-item>
                <text:p text:style-name="P53"><text:span text:style-name="T38"><text:s/>L’analyse est effectuée par </text:span><text:span text:style-name="T39">plusieurs relecteurs</text:span><text:span text:style-name="T38"> pour assurer une application cohérente des critères.</text:span></text:p>
              </text:list-item>
            </text:list>
          </draw:text-box>
        </draw:frame>
        <presentation:notes draw:style-name="dp4">
          <draw:page-thumbnail draw:name="Espace réservé de l'image des diapositives 20" draw:style-name="gr5" draw:layer="layout" svg:width="0.001cm" svg:height="0.001cm" svg:x="0cm" svg:y="2.257cm" draw:page-number="16" presentation:class="page"/>
          <draw:frame draw:name="Espace réservé des commentaires 18" presentation:style-name="pr39" draw:text-style-name="P10"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4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8" draw:text-style-name="P57" draw:layer="layout" svg:width="21.999cm" svg:height="11.413cm" svg:x="0.999cm" svg:y="1.843cm">
          <draw:text-box>
            <text:list text:style-name="L14">
              <text:list-header>
                <text:p text:style-name="P53"><text:span text:style-name="T40"/></text:p>
              </text:list-header>
            </text:list>
            <text:list text:style-name="L15">
              <text:list-item>
                <text:p text:style-name="P55"><text:span text:style-name="T38"><text:s/>La </text:span><text:span text:style-name="T39">rigueur méthodologique</text:span><text:span text:style-name="T38"> de chaque article de recherche primaire fait l’objet d’une </text:span><text:span text:style-name="T39">évaluation critique</text:span><text:span text:style-name="T38">, de manière </text:span><text:span text:style-name="T39">objective</text:span><text:span text:style-name="T38"> et </text:span><text:span text:style-name="T39">transparente</text:span><text:span text:style-name="T38">.</text:span></text:p>
              </text:list-item>
              <text:list-item>
                <text:p text:style-name="P55"><text:span text:style-name="T38"><text:s/>Les données probantes sont synthétisées et décrites, en incluant généralement des implications pratiques, politiques, de recherche, etc.</text:span></text:p>
              </text:list-item>
              <text:list-item>
                <text:p text:style-name="P56"><text:span text:style-name="T38"><text:s/>La </text:span><text:span text:style-name="T39">documentation</text:span><text:span text:style-name="T38"> fournie (supplementary information) garantit que la démarche est </text:span><text:span text:style-name="T39">reproductible et vérifiable</text:span><text:span text:style-name="T38">.</text:span></text:p>
              </text:list-item>
            </text:list>
          </draw:text-box>
        </draw:frame>
        <draw:frame draw:style-name="gr39" draw:text-style-name="P59" draw:layer="layout" svg:width="21.419cm" svg:height="3.085cm" svg:x="1.299cm" svg:y="11.07cm">
          <draw:text-box>
            <text:p text:style-name="P58"><text:span text:style-name="T41">[Traduction libre]</text:span></text:p>
            <text:p text:style-name="P47"><text:span text:style-name="T42">Source : Haddaway, N. R., Woodcock, P., Macura, B., &amp; Collins, A. (2015). Making literature reviews more reliable through application of lessons from systematic reviews. </text:span><text:span text:style-name="T43">Conservation Biology</text:span><text:span text:style-name="T42">, </text:span><text:span text:style-name="T43">29</text:span><text:span text:style-name="T42">(6), 1596‑1605. </text:span><text:span text:style-name="T42"><text:a xlink:href="https://doi.org/10.1111/cobi.12541" xlink:type="simple">https://doi.org/10.1111/cobi.12541</text:a></text:span><text:span text:style-name="T42"><text:s/></text:span></text:p>
          </draw:text-box>
        </draw:frame>
        <presentation:notes draw:style-name="dp4">
          <draw:page-thumbnail draw:name="Espace réservé de l'image des diapositives 39" draw:style-name="gr5" draw:layer="layout" svg:width="0.001cm" svg:height="0.001cm" svg:x="0cm" svg:y="2.257cm" draw:page-number="17" presentation:class="page"/>
          <draw:frame draw:name="Espace réservé des commentaires 30" presentation:style-name="pr41" draw:text-style-name="P10"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0" presentation:style-name="pr12" draw:text-style-name="P14" draw:layer="layout" svg:width="27.475cm" svg:height="2.761cm" svg:x="0.339cm" svg:y="0.361cm" presentation:class="title" presentation:user-transformed="true">
          <draw:text-box>
            <text:p text:style-name="P13"><text:span text:style-name="T7">Cadres méthodologiques </text:span></text:p>
          </draw:text-box>
        </draw:frame>
        <draw:frame draw:style-name="gr40"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60"><text:span text:style-name="T44">Nom</text:span></text:p>
              </table:table-cell>
              <table:table-cell>
                <text:p text:style-name="P60"><text:span text:style-name="T44">Fondée en...</text:span></text:p>
              </table:table-cell>
              <table:table-cell>
                <text:p text:style-name="P60"><text:span text:style-name="T44">Domaines</text:span></text:p>
              </table:table-cell>
              <table:table-cell>
                <text:p text:style-name="P60"><text:span text:style-name="T44">Organes de diffusion</text:span></text:p>
              </table:table-cell>
            </table:table-row>
            <table:table-row table:style-name="ro2" table:default-cell-style-name="ce4">
              <table:table-cell table:style-name="ce2">
                <text:p text:style-name="P61"><text:span text:style-name="T45">Cochrane</text:span></text:p>
              </table:table-cell>
              <table:table-cell table:style-name="ce3">
                <text:p text:style-name="P62"><text:span text:style-name="T46">1993</text:span></text:p>
              </table:table-cell>
              <table:table-cell>
                <text:p text:style-name="P63"><text:span text:style-name="T47">Santé et médecine</text:span></text:p>
              </table:table-cell>
              <table:table-cell>
                <text:p text:style-name="P63"><text:span text:style-name="T47"><text:a xlink:href="https://www.cochranelibrary.com/" xlink:type="simple">Bdd Cochrane Library</text:a></text:span><text:span text:style-name="T47"><text:s/>et revue en libre accès </text:span><text:span text:style-name="T48"><text:a xlink:href="https://onlinelibrary.wiley.com/journal/28329023" xlink:type="simple">Cochrane Evidence Synthesis and Methods</text:a></text:span></text:p>
              </table:table-cell>
            </table:table-row>
            <table:table-row table:style-name="ro1" table:default-cell-style-name="ce6">
              <table:table-cell table:style-name="ce5">
                <text:p text:style-name="P64"><text:span text:style-name="T49">Campbell</text:span></text:p>
              </table:table-cell>
              <table:table-cell table:style-name="ce3">
                <text:p text:style-name="P62"><text:span text:style-name="T46">2000</text:span></text:p>
              </table:table-cell>
              <table:table-cell>
                <text:p text:style-name="P65"><text:span text:style-name="T46">Sciences sociales</text:span></text:p>
              </table:table-cell>
              <table:table-cell>
                <text:p text:style-name="P65"><text:span text:style-name="T46">Revue en libre accès </text:span><text:span text:style-name="T48"><text:a xlink:href="https://onlinelibrary.wiley.com/journal/18911803" xlink:type="simple">Campbell Systematic Reviews</text:a></text:span></text:p>
              </table:table-cell>
            </table:table-row>
            <table:table-row table:style-name="ro3">
              <table:table-cell table:style-name="ce2">
                <text:p text:style-name="P61"><text:span text:style-name="T50">CEE (Collaboration for Environmental Evidence)</text:span></text:p>
              </table:table-cell>
              <table:table-cell table:style-name="ce3">
                <text:p text:style-name="P62"><text:span text:style-name="T51">2008</text:span></text:p>
              </table:table-cell>
              <table:table-cell table:style-name="ce7">
                <text:p text:style-name="P66"><text:span text:style-name="T52">Sciences de l’environnement</text:span></text:p>
              </table:table-cell>
              <table:table-cell table:style-name="ce4">
                <text:p text:style-name="P63"><text:span text:style-name="T51">Bdd </text:span><text:span text:style-name="T51"><text:a xlink:href="https://environmentalevidence.org/completed-reviews/" xlink:type="simple">CEE Evidence Synthesis Library</text:a></text:span><text:span text:style-name="T51"><text:s/>et revue en libre accès </text:span><text:span text:style-name="T53"><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5" draw:layer="layout" svg:width="0.001cm" svg:height="0.001cm" svg:x="0cm" svg:y="2.257cm" draw:page-number="18" presentation:class="page"/>
          <draw:frame draw:name="Espace réservé des commentaires 17" presentation:style-name="pr43" draw:text-style-name="P10"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23" presentation:style-name="pr12" draw:text-style-name="P14" draw:layer="layout" svg:width="24.66cm" svg:height="2.761cm" svg:x="0.339cm" svg:y="0.138cm" presentation:class="title" presentation:user-transformed="true">
          <draw:text-box>
            <text:p text:style-name="P13"><text:span text:style-name="T7">Cadres méthodologiques généraux</text:span></text:p>
          </draw:text-box>
        </draw:frame>
        <draw:frame draw:style-name="gr41" draw:text-style-name="P67" draw:layer="layout" svg:width="10.453cm" svg:height="11.788cm" svg:x="0.545cm" svg:y="0.711cm">
          <draw:text-box>
            <text:list text:style-name="L16">
              <text:list-item>
                <text:p text:style-name="P53"><text:span text:style-name="T54">Cochrane : plusieurs livres de références - </text:span><text:span text:style-name="T54"><text:a xlink:href="https://training.cochrane.org/handbooks" xlink:type="simple">handbooks</text:a></text:span></text:p>
              </text:list-item>
            </text:list>
            <text:list text:style-name="L1">
              <text:list-item>
                <text:p text:style-name="P19"><text:span text:style-name="T54">Campbell : </text:span><text:span text:style-name="T54"><text:a xlink:href="https://training.cochrane.org/cochrane-campbell-handbook-qualitative-evidence-synthesis" xlink:type="simple">Cochrane-Campbell Handbook for Qualitative Evidence Synthesis</text:a></text:span><text:span text:style-name="T54"><text:s/>- (v1.0 2023)</text:span></text:p>
              </text:list-item>
              <text:list-item>
                <text:p text:style-name="P19"><text:span text:style-name="T54">CEE :</text:span><text:span text:style-name="T54"><text:a xlink:href="https://environmentalevidence.org/information-for-authors/" xlink:type="simple"> Guidelines and Standards for Evidence Synthesis in Environmental Management</text:a></text:span><text:span text:style-name="T54"> - (v5.1 2022) </text:span></text:p>
              </text:list-item>
            </text:list>
          </draw:text-box>
        </draw:frame>
        <draw:frame draw:style-name="gr12" draw:text-style-name="P30"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5" draw:layer="layout" svg:width="0.001cm" svg:height="0.001cm" svg:x="0cm" svg:y="2.257cm" draw:page-number="19" presentation:class="page"/>
          <draw:frame draw:name="Espace réservé des commentaires 20" presentation:style-name="pr45" draw:text-style-name="P10"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0" draw:style-name="dp3" draw:master-page-name="Titre_20_et_20_contenu_5f_" presentation:presentation-page-layout-name="AL2T11" presentation:use-footer-name="ftr1">
        <office:forms form:automatic-focus="false" form:apply-design-mode="false"/>
        <draw:frame draw:name="Titre 42" presentation:style-name="pr12" draw:text-style-name="P14" draw:layer="layout" svg:width="23.999cm" svg:height="2.761cm" svg:x="0.499cm" svg:y="0.538cm" presentation:class="title" presentation:user-transformed="true">
          <draw:text-box>
            <text:p text:style-name="P13"><text:span text:style-name="T7">Cadres méthodologiques pour les résultats</text:span></text:p>
          </draw:text-box>
        </draw:frame>
        <draw:frame draw:style-name="gr42" draw:text-style-name="P70" draw:layer="layout" svg:width="13cm" svg:height="12.493cm" svg:x="0.199cm" svg:y="3.806cm">
          <draw:text-box>
            <text:list text:style-name="L16">
              <text:list-header>
                <text:p text:style-name="P68"><text:span text:style-name="T55">Méthodes et outils standardisés : liste de contrôle, diagramme de flux, etc.</text:span></text:p>
                <text:list>
                  <text:list-item>
                    <text:p text:style-name="P69"><text:span text:style-name="T55">Approuvé par Cochrane mais indépendant : PRISMA -Preferred Reporting Items for Systematic Reviews and Meta-Analyses : </text:span><text:span text:style-name="T55"><text:a xlink:href="https://www.prisma-statement.org/prisma-2020" xlink:type="simple">PRISMA2020</text:a></text:span></text:p>
                  </text:list-item>
                  <text:list-item>
                    <text:p text:style-name="P69"><text:span text:style-name="T55">Campbell : Methodologic Expectations for Campbell Collaboration Intervention Reviews: </text:span><text:span text:style-name="T55"><text:a xlink:href="https://doi.org/10.1002/cl2.1445" xlink:type="simple">MECCIR</text:a></text:span></text:p>
                  </text:list-item>
                  <text:list-item>
                    <text:p text:style-name="P69"><text:span text:style-name="T55">CEE : Reporting standards for Systematic Evidence Syntheses : </text:span><text:span text:style-name="T55"><text:a xlink:href="https://environmentalevidence.org/roses/" xlink:type="simple">ROSES</text:a></text:span></text:p>
                  </text:list-item>
                </text:list>
              </text:list-header>
            </text:list>
          </draw:text-box>
        </draw:frame>
        <draw:frame draw:style-name="gr12" draw:text-style-name="P30" draw:layer="layout" svg:width="10.499cm" svg:height="10.1cm" svg:x="13.999cm" svg:y="2.5cm">
          <draw:image xlink:href="Pictures/10000000000001F4000001E186D4DF5B.png" xlink:type="simple" xlink:show="embed" xlink:actuate="onLoad" draw:mime-type="image/png">
            <text:p/>
          </draw:image>
        </draw:frame>
        <draw:frame draw:style-name="gr43" draw:text-style-name="P71" draw:layer="layout" svg:width="11.001cm" svg:height="1.098cm" svg:x="13.999cm" svg:y="12.899cm">
          <draw:text-box>
            <text:p><text:span text:style-name="T22">Diagramme de flux PRISMA en français - Source : </text:span><text:span text:style-name="T22"><text:a xlink:href="https://fr.wikipedia.org/wiki/PRISMA_(Norme_de_réalisation_de_revue_systématique_de_la_littérature)" xlink:type="simple">Wikipedia</text:a></text:span><text:span text:style-name="T22"><text:s/></text:span></text:p>
          </draw:text-box>
        </draw:frame>
        <presentation:notes draw:style-name="dp4">
          <draw:page-thumbnail draw:name="Espace réservé de l'image des diapositives 40" draw:style-name="gr5" draw:layer="layout" svg:width="0.001cm" svg:height="0.001cm" svg:x="0cm" svg:y="2.257cm" draw:page-number="20" presentation:class="page"/>
          <draw:frame draw:name="Espace réservé des commentaires 31" presentation:style-name="pr47" draw:text-style-name="P10"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1" draw:style-name="dp3" draw:master-page-name="Titre_20_de_20_section" presentation:use-footer-name="ftr1">
        <office:forms form:automatic-focus="false" form:apply-design-mode="false"/>
        <draw:frame draw:name="Titre 3" presentation:style-name="pr14" draw:text-style-name="P32" draw:layer="layout" svg:width="21.907cm" svg:height="5.942cm" svg:x="1.729cm" svg:y="3.559cm" presentation:class="title" presentation:user-transformed="true">
          <draw:text-box>
            <text:p text:style-name="P31"><text:span text:style-name="T1">Modes de recherche bibliographique</text:span></text:p>
          </draw:text-box>
        </draw:frame>
        <draw:frame draw:name="Espace réservé du texte 2" presentation:style-name="pr15" draw:text-style-name="P33" draw:layer="layout" svg:width="21.907cm" svg:height="3.986cm" svg:x="1.729cm" svg:y="9.559cm" presentation:class="outline" presentation:user-transformed="true">
          <draw:text-box>
            <text:p text:style-name="P2"><text:span text:style-name="T19">Introduction : le triangle de la recherche</text:span></text:p>
            <text:p text:style-name="P2"><text:span text:style-name="T19">Types et modes de recherche</text:span></text:p>
            <text:p text:style-name="P2"><text:span text:style-name="T19">Focus sur la recherche de citations</text:span></text:p>
          </draw:text-box>
        </draw:frame>
        <draw:g draw:name="Keywords 1" draw:style-name="gr13">
          <draw:custom-shape draw:name="Rectangle 23"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5" draw:layer="layout" svg:width="0.001cm" svg:height="0.001cm" svg:x="0cm" svg:y="2.257cm" draw:page-number="21" presentation:class="page"/>
          <draw:frame draw:name="Espace réservé des commentaires 3" presentation:style-name="pr49" draw:text-style-name="P10"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4" draw:layer="layout" svg:width="21.907cm" svg:height="2.761cm" svg:x="0.437cm" svg:y="-0.311cm" presentation:class="title" presentation:user-transformed="true">
          <draw:text-box>
            <text:p text:style-name="P13"><text:span text:style-name="T7">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4" draw:text-style-name="P73" draw:layer="layout" svg:width="6.913cm" svg:height="5.145cm" svg:x="17.901cm" svg:y="7.293cm">
          <text:p text:style-name="P72"><text:span text:style-name="T56">«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5" draw:text-style-name="P24" draw:layer="layout" svg:width="24.114cm" svg:height="1.267cm" svg:x="0.297cm" svg:y="12.638cm">
          <text:p text:style-name="P23"><text:span text:style-name="T14">[Traduction libre]</text:span><text:span text:style-name="T13">. Source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5" draw:layer="layout" svg:width="0.001cm" svg:height="0.001cm" svg:x="0cm" svg:y="2.257cm" draw:page-number="22" presentation:class="page"/>
          <draw:frame draw:name="Espace réservé des commentaires 7" presentation:style-name="pr50" draw:text-style-name="P10"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2" presentation:style-name="pr12" draw:text-style-name="P14" draw:layer="layout" svg:width="21.907cm" svg:height="2.761cm" svg:x="0.79cm" svg:y="0.181cm" presentation:class="title" presentation:user-transformed="true">
          <draw:text-box>
            <text:p text:style-name="P13"><text:span text:style-name="T7">Le triangle de la recherche</text:span></text:p>
          </draw:text-box>
        </draw:frame>
        <draw:custom-shape draw:name="Rectangle 135" draw:style-name="gr46" draw:text-style-name="P7" draw:layer="layout" svg:width="24.114cm" svg:height="1.267cm" svg:x="0.74cm" svg:y="12.5cm">
          <text:p text:style-name="P23"><text:span text:style-name="T13">Voir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75" draw:layer="layout" svg:width="20.959cm" svg:height="10.769cm" svg:x="1.039cm" svg:y="3.209cm">
          <draw:text-box>
            <text:p text:style-name="P74"><text:span text:style-name="T57">Les 3 types de recherche et leurs objectifs</text:span></text:p>
            <text:list text:style-name="L16">
              <text:list-item>
                <text:p text:style-name="P74"><text:span text:style-name="T58">Lookup</text:span><text:span text:style-name="T57"> → recherche de </text:span><text:span text:style-name="T59">consultation</text:span><text:span text:style-name="T57"> - but de recherche </text:span><text:span text:style-name="T59">précis et restreint </text:span></text:p>
              </text:list-item>
              <text:list-item>
                <text:p text:style-name="P74"><text:span text:style-name="T58">Exploratorily</text:span><text:span text:style-name="T57"> → recherche </text:span><text:span text:style-name="T59">exploratoire</text:span><text:span text:style-name="T57"> - but de recherche en partie abstrait : </text:span><text:span text:style-name="T59">compréhension d’un sujet</text:span><text:span text:style-name="T57"> et </text:span><text:span text:style-name="T59">apprentissage</text:span></text:p>
              </text:list-item>
              <text:list-item>
                <text:p text:style-name="P74"><text:span text:style-name="T58">Systematic</text:span><text:span text:style-name="T57"> → recherche </text:span><text:span text:style-name="T59">systématique</text:span><text:span text:style-name="T57"> - triple objectif d’</text:span><text:span text:style-name="T59">exhaustivité</text:span><text:span text:style-name="T57">, de </text:span><text:span text:style-name="T59">transparence</text:span><text:span text:style-name="T57"> et de </text:span><text:span text:style-name="T59">reproductibilité</text:span></text:p>
              </text:list-item>
            </text:list>
            <text:p text:style-name="P74"><text:span text:style-name="T57">C’est le type de recherche (pourquoi?) et ses objectifs qui doivent déterminer les </text:span><text:span text:style-name="T59">méthodes</text:span><text:span text:style-name="T57"> de recherche : le choix du </text:span><text:span text:style-name="T59">système de recherche</text:span><text:span text:style-name="T57"> (où? → outil de recherche) et l’</text:span><text:span text:style-name="T59">heuristique</text:span><text:span text:style-name="T57"> </text:span><text:span text:style-name="T59">de recherche</text:span><text:span text:style-name="T57"> (comment? → mode de recherche).</text:span></text:p>
            <text:list text:continue-numbering="true" text:style-name="L16">
              <text:list-item>
                <text:list>
                  <text:list-header>
                    <text:p text:style-name="P74"><text:span text:style-name="T40"><text:s/></text:span></text:p>
                  </text:list-header>
                </text:list>
              </text:list-item>
            </text:list>
          </draw:text-box>
        </draw:frame>
        <presentation:notes draw:style-name="dp4">
          <draw:page-thumbnail draw:name="Espace réservé de l'image des diapositives 21" draw:style-name="gr5" draw:layer="layout" svg:width="0.001cm" svg:height="0.001cm" svg:x="0cm" svg:y="2.257cm" draw:page-number="23" presentation:class="page"/>
          <draw:frame draw:name="Espace réservé des commentaires 19" presentation:style-name="pr52" draw:text-style-name="P10"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24" presentation:style-name="pr12" draw:text-style-name="P76" draw:layer="layout" svg:width="21.907cm" svg:height="2.761cm" svg:x="1.016cm" svg:y="0cm" presentation:class="title" presentation:user-transformed="true">
          <draw:text-box>
            <text:p text:style-name="P13"><text:span text:style-name="T7">Modes de recherche</text:span></text:p>
          </draw:text-box>
        </draw:frame>
        <draw:frame draw:name="Espace réservé du contenu 9" presentation:style-name="pr54" draw:text-style-name="P79" draw:layer="layout" svg:width="20.855cm" svg:height="10.48cm" svg:x="0.561cm" svg:y="2.999cm" presentation:class="outline" presentation:user-transformed="true">
          <draw:text-box>
            <text:p text:style-name="P77"><text:span text:style-name="T60">Quels modes de recherche identifiez-vous dans chacun des 2 articles suivants ?</text:span></text:p>
            <text:list text:style-name="L18">
              <text:list-item>
                <text:list>
                  <text:list-header>
                    <text:p text:style-name="P78"><text:span text:style-name="T61">Akın Ateş, M., Suurmond, R., Luzzini, D., &amp; Krause, D. (2022). Order from chaos : A meta-analysis of supply chain complexity and firm performance. </text:span><text:span text:style-name="T62">Journal of Supply Chain Management</text:span><text:span text:style-name="T61">, </text:span><text:span text:style-name="T62">58</text:span><text:span text:style-name="T61">(1), 3‑30. </text:span><text:span text:style-name="T61"><text:a xlink:href="https://doi.org/10.1111/jscm.12264" xlink:type="simple">https://doi.org/10.1111/jscm.12264</text:a></text:span><text:span text:style-name="T61"><text:s/>[p. 8-9]</text:span></text:p>
                    <text:p text:style-name="P78"><text:span text:style-name="T61">Boness, C. L., Watts, A. L., Moeller, K. N., &amp; Sher, K. J. (2021). The Etiologic, Theory-Based, Ontogenetic Hierarchical Framework of Alcohol Use Disorder : A Translational Systematic Review of Reviews. </text:span><text:span text:style-name="T62">Psychological Bulletin</text:span><text:span text:style-name="T61">, </text:span><text:span text:style-name="T62">147</text:span><text:span text:style-name="T61">(10), 1075‑1123. </text:span><text:span text:style-name="T61"><text:a xlink:href="https://doi.org/10.1037/bul0000333" xlink:type="simple">https://doi.org/10.1037/bul0000333</text:a></text:span><text:span text:style-name="T61"><text:s/>[p. 13]</text:span></text:p>
                  </text:list-header>
                </text:list>
              </text:list-item>
            </text:list>
          </draw:text-box>
        </draw:frame>
        <presentation:notes draw:style-name="dp4">
          <draw:page-thumbnail draw:name="Espace réservé de l'image des diapositives 23" draw:style-name="gr5" draw:layer="layout" svg:width="0.001cm" svg:height="0.001cm" svg:x="0cm" svg:y="2.257cm" draw:page-number="24" presentation:class="page"/>
          <draw:frame draw:name="Espace réservé des commentaires 21" presentation:style-name="pr55" draw:text-style-name="P10"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6" draw:layer="layout" svg:width="21.907cm" svg:height="2.761cm" svg:x="1.743cm" svg:y="0cm" presentation:class="title" presentation:user-transformed="true">
          <draw:text-box>
            <text:p text:style-name="P13"><text:span text:style-name="T7">Modes de recherche</text:span></text:p>
          </draw:text-box>
        </draw:frame>
        <draw:frame draw:name="Espace réservé du contenu 4" presentation:style-name="pr57" draw:text-style-name="P83" draw:layer="layout" svg:width="22.755cm" svg:height="11.5cm" svg:x="1.743cm" svg:y="2.499cm" presentation:class="outline" presentation:user-transformed="true">
          <draw:text-box>
            <text:p text:style-name="P80"><text:span text:style-name="T63">Modes utilisés dans les 2 articles de la diapo précédente : voir <text:s/>Gusenbauer, M., &amp; Gauster, S. P. (2025). How to search for literature in systematic reviews and meta-analyses : A comprehensive step-by-step guide. </text:span><text:span text:style-name="T64">Technological Forecasting and Social Change</text:span><text:span text:style-name="T63">, 212, 123833. </text:span><text:span text:style-name="T63"><text:a xlink:href="https://doi.org/10.1016/j.techfore.2024.123833" xlink:type="simple">https://doi.org/10.1016/j.techfore.2024.123833</text:a></text:span><text:span text:style-name="T63"><text:s/>- fichier supplémentaire, p. 35-36</text:span></text:p>
            <text:p text:style-name="P80"><text:span text:style-name="T60">Aujourd’hui nous insistons sur 2 modes de recherche.</text:span></text:p>
            <text:list text:style-name="L19">
              <text:list-item>
                <text:p text:style-name="P81"><text:span text:style-name="T65">Building blocks </text:span><text:span text:style-name="T60">: équation de recherche avec opérateurs booléens : cf. infra, après la pause ;)</text:span></text:p>
              </text:list-item>
              <text:list-item>
                <text:p text:style-name="P81"><text:span text:style-name="T65">Recherche de citations </text:span><text:span text:style-name="T60">: navigation dans les liens de citation</text:span></text:p>
              </text:list-item>
            </text:list>
            <text:list text:style-name="L20">
              <text:list-item>
                <text:list>
                  <text:list-item>
                    <text:p text:style-name="P82"><text:span text:style-name="T61">manuellement, </text:span></text:p>
                  </text:list-item>
                  <text:list-item>
                    <text:p text:style-name="P82"><text:span text:style-name="T61">automatiquement en recourant aux fonctionnalités dédiées de certains outils de recherche : Web of Science, Scopus, The Lens,</text:span></text:p>
                  </text:list-item>
                  <text:list-item>
                    <text:p text:style-name="P82"><text:span text:style-name="T66">ou avec l’assistance de services comme </text:span><text:span text:style-name="T67"><text:a xlink:href="https://www.researchrabbit.ai/" xlink:type="simple">ResearchRabbit</text:a></text:span><text:span text:style-name="T66"><text:s/>ou </text:span><text:span text:style-name="T66"><text:a xlink:href="https://estech.shinyapps.io/citationchaser/" xlink:type="simple"> Citation Chaser</text:a></text:span><text:span text:style-name="T66"><text:s/>- voir</text:span><text:span text:style-name="T68"> </text:span><text:span text:style-name="T69"><text:a xlink:href="https://github.com/fflamerie/intro_revlit/blob/main/docs/Fiche_ExploLit.pdf" xlink:type="simple">fiche dédiée</text:a></text:span><text:span text:style-name="T69"> ; ou encore </text:span><text:span text:style-name="T69"><text:a xlink:href="https://paperfetcher.github.io/" xlink:type="simple">Paperfetcher</text:a></text:span><text:span text:style-name="T69">, qui permet aussi de rechercher manuellement dans les revues indexées par Crossref</text:span></text:p>
                  </text:list-item>
                </text:list>
              </text:list-item>
            </text:list>
          </draw:text-box>
        </draw:frame>
        <presentation:notes draw:style-name="dp4">
          <draw:page-thumbnail draw:name="Espace réservé de l'image des diapositives 8" draw:style-name="gr5" draw:layer="layout" svg:width="0.001cm" svg:height="0.001cm" svg:x="0cm" svg:y="2.257cm" draw:page-number="25" presentation:class="page"/>
          <draw:frame draw:name="Espace réservé des commentaires 8" presentation:style-name="pr58" draw:text-style-name="P10"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3" presentation:style-name="pr12" draw:text-style-name="P22" draw:layer="layout" svg:width="21.907cm" svg:height="2.761cm" svg:x="1.098cm" svg:y="0cm" presentation:class="title" presentation:user-transformed="true">
          <draw:text-box>
            <text:p text:style-name="P13"><text:span text:style-name="T7">Recherche de citations</text:span></text:p>
          </draw:text-box>
        </draw:frame>
        <draw:frame draw:name="Espace réservé du contenu 18" presentation:style-name="pr57" draw:text-style-name="P83" draw:layer="layout" svg:width="15cm" svg:height="11cm" svg:x="0.999cm" svg:y="2.899cm" presentation:class="outline" presentation:user-transformed="true">
          <draw:text-box>
            <text:p text:style-name="P80"><text:span text:style-name="T8">Recherche par </text:span><text:span text:style-name="T70">mots-clés</text:span><text:span text:style-name="T8"> → identifie les points communs </text:span><text:span text:style-name="T70">linguistiques</text:span></text:p>
            <text:p text:style-name="P80"><text:span text:style-name="T71">Recherche par </text:span><text:span text:style-name="T72">citations</text:span><text:span text:style-name="T71"> <text:s/>→ </text:span><text:span text:style-name="T8"><text:s/>identifie les points communs </text:span><text:span text:style-name="T70">thématiques</text:span></text:p>
            <text:p text:style-name="P78"><text:span text:style-name="T8">Recherche </text:span><text:span text:style-name="T70">exploratoire</text:span><text:span text:style-name="T8"> : utilité++ notamment recherche à partir d’un ou plusieurs articles « graine », avec recommandation ou non</text:span></text:p>
            <text:list text:style-name="L19">
              <text:list-header>
                <text:p text:style-name="P78"><text:span text:style-name="T8"/></text:p>
                <text:p text:style-name="P78"><text:span text:style-name="T8"/></text:p>
              </text:list-header>
            </text:list>
            <text:list text:style-name="L21">
              <text:list-item>
                <text:list>
                  <text:list-header>
                    <text:p text:style-name="P84"><text:span text:style-name="T8"/></text:p>
                  </text:list-header>
                </text:list>
              </text:list-item>
            </text:list>
          </draw:text-box>
        </draw:frame>
        <draw:custom-shape draw:name="Rectangle 133" draw:style-name="gr48" draw:text-style-name="P86" draw:layer="layout" svg:width="8.414cm" svg:height="5.817cm" svg:x="16.499cm" svg:y="3cm">
          <text:p text:style-name="P85"><text:span text:style-name="T73">«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87" draw:layer="layout" svg:width="8.499cm" svg:height="4.625cm" svg:x="16.498cm" svg:y="9.241cm">
          <draw:text-box>
            <text:p text:style-name="P47"><text:span text:style-name="T22">Source : Gusenbauer, M. (2024). Beyond Google Scholar, Scopus, and Web of Science : An evaluation of the backward and forward citation coverage of 59 databases’ citation indices. </text:span><text:span text:style-name="T23">Research Synthesis Methods</text:span><text:span text:style-name="T22">, </text:span><text:span text:style-name="T23">15</text:span><text:span text:style-name="T22">(5), 802‑817. </text:span><text:span text:style-name="T22"><text:a xlink:href="https://doi.org/10.1002/jrsm.1729" xlink:type="simple">https://doi.org/10.1002/jrsm.1729</text:a></text:span><text:span text:style-name="T22"><text:s/></text:span></text:p>
          </draw:text-box>
        </draw:frame>
        <presentation:notes draw:style-name="dp4">
          <draw:page-thumbnail draw:name="Espace réservé de l'image des diapositives 41" draw:style-name="gr5" draw:layer="layout" svg:width="0.001cm" svg:height="0.001cm" svg:x="0cm" svg:y="2.257cm" draw:page-number="26" presentation:class="page"/>
          <draw:frame draw:name="Espace réservé des commentaires 32" presentation:style-name="pr60" draw:text-style-name="P10"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44" presentation:style-name="pr12" draw:text-style-name="P22" draw:layer="layout" svg:width="21.907cm" svg:height="2.761cm" svg:x="1.498cm" svg:y="0cm" presentation:class="title" presentation:user-transformed="true">
          <draw:text-box>
            <text:p text:style-name="P13"><text:span text:style-name="T7">Recherche de citations</text:span></text:p>
          </draw:text-box>
        </draw:frame>
        <draw:frame draw:name="Espace réservé du contenu 19" presentation:style-name="pr57" draw:text-style-name="P83" draw:layer="layout" svg:width="21.907cm" svg:height="9.239cm" svg:x="1.592cm" svg:y="2.499cm" presentation:class="outline" presentation:user-transformed="true">
          <draw:text-box>
            <text:p text:style-name="P80"><text:span text:style-name="T8">Recherche </text:span><text:span text:style-name="T70">systématique</text:span><text:span text:style-name="T8"> </text:span></text:p>
            <text:list text:style-name="L19">
              <text:list-item>
                <text:p text:style-name="P80"><text:span text:style-name="T8">Recherche des références citées (en </text:span><text:span text:style-name="T70">amont</text:span><text:span text:style-name="T8">, </text:span><text:span text:style-name="T74">backward</text:span><text:span text:style-name="T8">) obligatoire pour les revues </text:span><text:span text:style-name="T70">Cochrane</text:span></text:p>
              </text:list-item>
              <text:list-item>
                <text:p text:style-name="P80"><text:span text:style-name="T8">Recherche en amont et en aval (</text:span><text:span text:style-name="T74">foreward</text:span><text:span text:style-name="T8">) souhaitable pour les sujets « difficiles à chercher » : </text:span></text:p>
              </text:list-item>
            </text:list>
            <text:list text:style-name="L20">
              <text:list-item>
                <text:list>
                  <text:list-item>
                    <text:p text:style-name="P88"><text:span text:style-name="T8">concepts peu clairs, </text:span></text:p>
                  </text:list-item>
                  <text:list-item>
                    <text:p text:style-name="P88"><text:span text:style-name="T8">mots-clés peu précis, </text:span></text:p>
                  </text:list-item>
                  <text:list-item>
                    <text:p text:style-name="P88"><text:span text:style-name="T8">peu de résultats de recherche,</text:span></text:p>
                  </text:list-item>
                  <text:list-item>
                    <text:p text:style-name="P88"><text:span text:style-name="T8">et/ou difficiles à retrouver par le langage.</text:span></text:p>
                  </text:list-item>
                </text:list>
              </text:list-item>
            </text:list>
          </draw:text-box>
        </draw:frame>
        <draw:frame draw:style-name="gr50" draw:text-style-name="P89" draw:layer="layout" svg:width="22.406cm" svg:height="1.471cm" svg:x="1.498cm" svg:y="12.028cm">
          <draw:text-box>
            <text:p text:style-name="P80"><text:span text:style-name="T63">Voir <text:s/>Gusenbauer, M., &amp; Gauster, S. P. (2025). How to search for literature in systematic reviews and meta-analyses : A comprehensive step-by-step guide. </text:span><text:span text:style-name="T64">Technological Forecasting and Social Change</text:span><text:span text:style-name="T63">, </text:span><text:span text:style-name="T64">212</text:span><text:span text:style-name="T63">, 123833.</text:span></text:p>
          </draw:text-box>
        </draw:frame>
        <presentation:notes draw:style-name="dp4">
          <draw:page-thumbnail draw:name="Espace réservé de l'image des diapositives 42" draw:style-name="gr5" draw:layer="layout" svg:width="0.001cm" svg:height="0.001cm" svg:x="0cm" svg:y="2.257cm" draw:page-number="27" presentation:class="page"/>
          <draw:frame draw:name="Espace réservé des commentaires 33" presentation:style-name="pr62" draw:text-style-name="P10"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8" draw:style-name="dp3" draw:master-page-name="Titre_20_et_20_contenu_5f_" presentation:presentation-page-layout-name="AL2T11" presentation:use-footer-name="ftr1">
        <office:forms form:automatic-focus="false" form:apply-design-mode="false"/>
        <draw:frame draw:name="Titre 26" presentation:style-name="pr12" draw:text-style-name="P22" draw:layer="layout" svg:width="11.5cm" svg:height="2.761cm" svg:x="0.999cm" svg:y="0.499cm" presentation:class="title" presentation:user-transformed="true">
          <draw:text-box>
            <text:p text:style-name="P13"><text:span text:style-name="T7">Recherche de citations</text:span></text:p>
          </draw:text-box>
        </draw:frame>
        <draw:frame draw:name="Espace réservé du contenu 11" presentation:style-name="pr57" draw:text-style-name="P83" draw:layer="layout" svg:width="10.906cm" svg:height="5.692cm" svg:x="1.091cm" svg:y="3.807cm" presentation:class="outline" presentation:user-transformed="true">
          <draw:text-box>
            <text:p text:style-name="P80"><text:span text:style-name="T8">Vue d’ensemble des méthodes de recherche de citations, directes et indirectes</text:span></text:p>
            <text:list text:style-name="L18">
              <text:list-header>
                <text:p text:style-name="P77"><text:span text:style-name="T8"/></text:p>
              </text:list-header>
            </text:list>
            <text:list text:style-name="L21">
              <text:list-item>
                <text:list>
                  <text:list-header>
                    <text:p text:style-name="P84"><text:span text:style-name="T8"/></text:p>
                  </text:list-header>
                </text:list>
              </text:list-item>
            </text:list>
          </draw:text-box>
        </draw:frame>
        <draw:frame draw:style-name="gr12" draw:text-style-name="P30" draw:layer="layout" svg:width="11.013cm" svg:height="14cm" svg:x="13.686cm" svg:y="0.188cm">
          <draw:image xlink:href="Pictures/10000000000005930000071651918913.jpg" xlink:type="simple" xlink:show="embed" xlink:actuate="onLoad" draw:mime-type="image/jpeg">
            <text:p/>
          </draw:image>
        </draw:frame>
        <draw:frame draw:style-name="gr51" draw:text-style-name="P87" draw:layer="layout" svg:width="12.499cm" svg:height="2.366cm" svg:x="0.999cm" svg:y="11.499cm">
          <draw:text-box>
            <text:p text:style-name="P47"><text:span text:style-name="T22">Source : Hirt, J., Nordhausen, T., Fuerst, T., Ewald, H., &amp; Appenzeller-Herzog, C. (2024). Guidance on terminology, application, and reporting of citation searching : The TARCiS statement. </text:span><text:span text:style-name="T23">BMJ</text:span><text:span text:style-name="T22">, </text:span><text:span text:style-name="T23">385</text:span><text:span text:style-name="T22">, e078384. </text:span><text:span text:style-name="T22"><text:a xlink:href="https://doi.org/10.1136/bmj-2023-078384" xlink:type="simple">https://doi.org/10.1136/bmj-2023-078384</text:a></text:span><text:span text:style-name="T22"><text:s/></text:span></text:p>
          </draw:text-box>
        </draw:frame>
        <presentation:notes draw:style-name="dp4">
          <draw:page-thumbnail draw:name="Espace réservé de l'image des diapositives 25" draw:style-name="gr5" draw:layer="layout" svg:width="0.001cm" svg:height="0.001cm" svg:x="0cm" svg:y="2.257cm" draw:page-number="28" presentation:class="page"/>
          <draw:frame draw:name="Espace réservé des commentaires 23" presentation:style-name="pr64" draw:text-style-name="P10"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9" draw:style-name="dp3" draw:master-page-name="Titre_20_de_20_section" presentation:use-footer-name="ftr1">
        <office:forms form:automatic-focus="false" form:apply-design-mode="false"/>
        <draw:frame draw:name="Titre 4" presentation:style-name="pr14" draw:text-style-name="P32" draw:layer="layout" svg:width="21.907cm" svg:height="5.942cm" svg:x="1.729cm" svg:y="3.559cm" presentation:class="title" presentation:user-transformed="true">
          <draw:text-box>
            <text:p text:style-name="P31"><text:span text:style-name="T1">Outils de recherche bibliographique</text:span></text:p>
          </draw:text-box>
        </draw:frame>
        <draw:frame draw:name="Espace réservé du texte 3" presentation:style-name="pr15" draw:text-style-name="P33" draw:layer="layout" svg:width="21.907cm" svg:height="3.986cm" svg:x="1.729cm" svg:y="9.559cm" presentation:class="outline" presentation:user-transformed="true">
          <draw:text-box>
            <text:p text:style-name="P2"><text:span text:style-name="T19">Typologie et exemples</text:span></text:p>
            <text:p text:style-name="P2"><text:span text:style-name="T19">Critères de choix</text:span></text:p>
            <text:p text:style-name="P90"><text:span text:style-name="T19">Le cas de la littérature grise</text:span></text:p>
            <text:p text:style-name="P90"><text:span text:style-name="T19"/></text:p>
          </draw:text-box>
        </draw:frame>
        <draw:g draw:name="Keywords 2" draw:style-name="gr13">
          <draw:custom-shape draw:name="Rectangle 44"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5" draw:layer="layout" svg:width="0.001cm" svg:height="0.001cm" svg:x="0cm" svg:y="2.257cm" draw:page-number="29" presentation:class="page"/>
          <draw:frame draw:name="Espace réservé des commentaires 4" presentation:style-name="pr66" draw:text-style-name="P10"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7" draw:layer="layout" svg:width="23.908cm" svg:height="11.472cm" svg:x="0.999cm" svg:y="2.804cm" presentation:class="outline" presentation:user-transformed="true">
          <draw:text-box>
            <text:p text:style-name="P35"><text:span text:style-name="T75">Quelles différences faites-vous entre les outils mentionnés ci-dessous ? Selon quelles catégories les classez-vous ?</text:span></text:p>
            <text:list text:style-name="L22">
              <text:list-item>
                <text:p text:style-name="P35"><text:span text:style-name="T75">Google Scholar</text:span></text:p>
              </text:list-item>
              <text:list-item>
                <text:p text:style-name="P35"><text:span text:style-name="T75">EBSCO host</text:span></text:p>
              </text:list-item>
              <text:list-item>
                <text:p text:style-name="P35"><text:span text:style-name="T75">Web of Science</text:span></text:p>
              </text:list-item>
              <text:list-item>
                <text:p text:style-name="P35"><text:span text:style-name="T75">CAIRN</text:span></text:p>
              </text:list-item>
              <text:list-item>
                <text:p text:style-name="P35"><text:span text:style-name="T75">CORE</text:span></text:p>
              </text:list-item>
              <text:list-item>
                <text:p text:style-name="P35"><text:span text:style-name="T75">APA PsycInfo</text:span></text:p>
              </text:list-item>
              <text:list-item>
                <text:p text:style-name="P35"><text:span text:style-name="T75">Web of Science Core Collection</text:span></text:p>
              </text:list-item>
              <text:list-item>
                <text:p text:style-name="P35"><text:span text:style-name="T75">ERIH PLUS - Dimensions</text:span></text:p>
              </text:list-item>
            </text:list>
          </draw:text-box>
        </draw:frame>
        <draw:frame draw:name="Titre 10" presentation:style-name="pr12" draw:text-style-name="P22" draw:layer="layout" svg:width="21.907cm" svg:height="2.761cm" svg:x="0.65cm" svg:y="0.043cm" presentation:class="title" presentation:user-transformed="true">
          <draw:text-box>
            <text:p text:style-name="P13"><text:span text:style-name="T7">Typologie des outils de recherche</text:span></text:p>
          </draw:text-box>
        </draw:frame>
        <presentation:notes draw:style-name="dp4">
          <draw:page-thumbnail draw:name="Espace réservé de l'image des diapositives 9" draw:style-name="gr5" draw:layer="layout" svg:width="0.001cm" svg:height="0.001cm" svg:x="0cm" svg:y="2.257cm" draw:page-number="30" presentation:class="page"/>
          <draw:frame draw:name="Espace réservé des commentaires 9" presentation:style-name="pr68" draw:text-style-name="P10"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50" draw:layer="layout" svg:width="12.499cm" svg:height="8.5cm" svg:x="0.999cm" svg:y="6.999cm" presentation:class="outline" presentation:user-transformed="true">
          <draw:text-box>
            <text:list text:style-name="L13">
              <text:list-header>
                <text:p><text:span text:style-name="T76"/></text:p>
              </text:list-header>
              <text:list-item>
                <text:p><text:span text:style-name="T77">Enjeux en termes de fonctionnalités</text:span></text:p>
              </text:list-item>
              <text:list-item>
                <text:p><text:span text:style-name="T77">Enjeux de transparence </text:span></text:p>
              </text:list-item>
              <text:list-item>
                <text:p><text:span text:style-name="T77">Risques de renforcement des biais avec les « efficaces-rapides »</text:span></text:p>
              </text:list-item>
            </text:list>
          </draw:text-box>
        </draw:frame>
        <draw:frame draw:name="Titre 29" presentation:style-name="pr12" draw:text-style-name="P22" draw:layer="layout" svg:width="21.907cm" svg:height="2.761cm" svg:x="0.933cm" svg:y="0.321cm" presentation:class="title" presentation:user-transformed="true">
          <draw:text-box>
            <text:p text:style-name="P13"><text:span text:style-name="T7">Typologie des outils de recherche </text:span></text:p>
          </draw:text-box>
        </draw:frame>
        <draw:custom-shape draw:name="Rectangle 131" draw:style-name="gr52" draw:text-style-name="P92" draw:layer="layout" svg:width="9.914cm" svg:height="4.973cm" svg:x="14.998cm" svg:y="6.8cm">
          <text:p text:style-name="P91"><text:span text:style-name="T11">«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87" draw:layer="layout" svg:width="20.832cm" svg:height="1.709cm" svg:x="1.316cm" svg:y="12.373cm">
          <draw:text-box>
            <text:p text:style-name="P47"><text:span text:style-name="T22">Source : Gusenbauer, M., &amp; Haddaway, N. (2021). What every Researcher should know about Searching – Clarified Concepts, Search Advice, and an Agenda to improve Finding in Academia. </text:span><text:span text:style-name="T23">Research Synthesis Methods</text:span><text:span text:style-name="T22">, </text:span><text:span text:style-name="T23">12</text:span><text:span text:style-name="T22">(2), 136‑147. </text:span><text:span text:style-name="T22"><text:a xlink:href="https://doi.org/10.1002/jrsm.1457" xlink:type="simple">https://doi.org/10.1002/jrsm.1457</text:a></text:span><text:span text:style-name="T22"><text:s/></text:span></text:p>
          </draw:text-box>
        </draw:frame>
        <draw:frame draw:style-name="gr54" draw:text-style-name="P93" draw:layer="layout" svg:width="22.365cm" svg:height="4.706cm" svg:x="1.132cm" svg:y="2.657cm">
          <draw:text-box>
            <text:p><text:span text:style-name="T75">Distinction 1/2 : Distinguer </text:span><text:span text:style-name="T78"><text:s/>les bases de données bibliographiques traditionnelles (Web of Science, Scopus) « </text:span><text:span text:style-name="T79">exhaustives-transparentes</text:span><text:span text:style-name="T78"> » « </text:span><text:span text:style-name="T80">comprehensive-transparent</text:span><text:span text:style-name="T78"> » et les nouveaux moteurs de recherche (Google Scholar, Semantic Scholars) « </text:span><text:span text:style-name="T79">efficaces-rapides</text:span><text:span text:style-name="T78"> » « </text:span><text:span text:style-name="T80">efficient-slick</text:span><text:span text:style-name="T81"> »</text:span></text:p>
          </draw:text-box>
        </draw:frame>
        <presentation:notes draw:style-name="dp4">
          <draw:page-thumbnail draw:name="Espace réservé de l'image des diapositives 28" draw:style-name="gr5" draw:layer="layout" svg:width="0.001cm" svg:height="0.001cm" svg:x="0cm" svg:y="2.257cm" draw:page-number="31" presentation:class="page"/>
          <draw:frame draw:name="Espace réservé des commentaires 26" presentation:style-name="pr70" draw:text-style-name="P10"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Titre 55" presentation:style-name="pr12" draw:text-style-name="P76" draw:layer="layout" svg:width="21.907cm" svg:height="2.761cm" svg:x="0.933cm" svg:y="0.321cm" presentation:class="title" presentation:user-transformed="true">
          <draw:text-box>
            <text:p text:style-name="P13"><text:span text:style-name="T7">Typologie des outils de recherche </text:span></text:p>
          </draw:text-box>
        </draw:frame>
        <draw:frame draw:style-name="gr55" draw:text-style-name="P87" draw:layer="layout" svg:width="24.1cm" svg:height="1.223cm" svg:x="0.899cm" svg:y="12.528cm">
          <draw:text-box>
            <text:p text:style-name="P47"><text:span text:style-name="T22">Voir : Delgado-Quirós, L., &amp; Ortega, J. L. (2024). Completeness degree of publication metadata in eight free-access scholarly databases. </text:span><text:span text:style-name="T23">Quantitative Science Studies</text:span><text:span text:style-name="T22">, </text:span><text:span text:style-name="T23">5</text:span><text:span text:style-name="T22">(1), 31‑49. </text:span><text:span text:style-name="T22"><text:a xlink:href="https://doi.org/10.1162/qss_a_00286" xlink:type="simple">https://doi.org/10.1162/qss_a_00286</text:a></text:span><text:span text:style-name="T22"><text:s/></text:span></text:p>
          </draw:text-box>
        </draw:frame>
        <draw:frame draw:style-name="gr56" draw:text-style-name="P93" draw:layer="layout" svg:width="21cm" svg:height="9.161cm" svg:x="1.498cm" svg:y="3.229cm">
          <draw:text-box>
            <text:p><text:span text:style-name="T75">Distinction 1/2 : 3ème catégorie = les </text:span><text:span text:style-name="T82">bases de données « hybrides » - </text:span><text:span text:style-name="T75">exemples OpenAlex, Dimensions, The Lens</text:span></text:p>
            <text:p><text:span text:style-name="T75"/></text:p>
            <text:list text:style-name="L1">
              <text:list-item>
                <text:p><text:span text:style-name="T75">Partagent certaines caractéristiques des moteurs de recherche académiques, par exemple le modèle d’accès</text:span></text:p>
              </text:list-item>
              <text:list-item>
                <text:p><text:span text:style-name="T75">Parmi leurs particularités : alimentées par des bases de données tierces ; fournissent des métadonnées plus complètes et en plus grand nombre que les moteurs de recherche</text:span></text:p>
              </text:list-item>
            </text:list>
            <text:p><text:span text:style-name="T75"/></text:p>
          </draw:text-box>
        </draw:frame>
        <presentation:notes draw:style-name="dp4">
          <draw:page-thumbnail draw:name="Espace réservé de l'image des diapositives 57" draw:style-name="gr5" draw:layer="layout" svg:width="0.001cm" svg:height="0.001cm" svg:x="0cm" svg:y="2.257cm" draw:page-number="32" presentation:class="page"/>
          <draw:frame draw:name="Espace réservé des commentaires 43" presentation:style-name="pr72" draw:text-style-name="P10"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50" draw:layer="layout" svg:width="23.408cm" svg:height="12.183cm" svg:x="0.998cm" svg:y="3.316cm" presentation:class="outline" presentation:user-transformed="true">
          <draw:text-box>
            <text:p><text:span text:style-name="T83">Distinction 2/2 : distinguer </text:span><text:span text:style-name="T84">plateforme</text:span><text:span text:style-name="T83"> et </text:span><text:span text:style-name="T84">base de données</text:span></text:p>
            <text:p text:style-name="P35"><text:span text:style-name="T85">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5"><text:span text:style-name="T85">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5"><text:span text:style-name="T85">[Traduction libre]</text:span></text:p>
          </draw:text-box>
        </draw:frame>
        <draw:frame draw:name="Titre 25" presentation:style-name="pr12" draw:text-style-name="P22" draw:layer="layout" svg:width="21.907cm" svg:height="2.761cm" svg:x="0.933cm" svg:y="0.321cm" presentation:class="title" presentation:user-transformed="true">
          <draw:text-box>
            <text:p text:style-name="P13"><text:span text:style-name="T7">Typologie des outils de recherche</text:span></text:p>
          </draw:text-box>
        </draw:frame>
        <draw:frame draw:style-name="gr57" draw:text-style-name="P94" draw:layer="layout" svg:width="22.303cm" svg:height="3.08cm" svg:x="0.696cm" svg:y="12.419cm">
          <draw:text-box>
            <text:p><text:span text:style-name="T22">Source : Haddaway, N. R., Rethlefsen, M. L., Davies, M., Glanville, J., McGowan, B., Nyhan, K., &amp; Young, S. (2022). A suggested data structure for transparent and repeatable reporting of bibliographic searching. </text:span><text:span text:style-name="T23">Campbell Systematic Reviews</text:span><text:span text:style-name="T22">, </text:span><text:span text:style-name="T23">18</text:span><text:span text:style-name="T22">(4), e1288. </text:span><text:span text:style-name="T22"><text:a xlink:href="https://doi.org/10.1002/cl2.1288" xlink:type="simple">https://doi.org/10.1002/cl2.1288</text:a></text:span></text:p>
          </draw:text-box>
        </draw:frame>
        <presentation:notes draw:style-name="dp4">
          <draw:page-thumbnail draw:name="Espace réservé de l'image des diapositives 24" draw:style-name="gr5" draw:layer="layout" svg:width="0.001cm" svg:height="0.001cm" svg:x="0cm" svg:y="2.257cm" draw:page-number="33" presentation:class="page"/>
          <draw:frame draw:name="Espace réservé des commentaires 22" presentation:style-name="pr74" draw:text-style-name="P10"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Titre 28" presentation:style-name="pr12" draw:text-style-name="P22" draw:layer="layout" svg:width="21.907cm" svg:height="2.761cm" svg:x="0.499cm" svg:y="-0.26cm" presentation:class="title" presentation:user-transformed="true">
          <draw:text-box>
            <text:p text:style-name="P13"><text:span text:style-name="T7">Typologie des outils de recherche</text:span></text:p>
          </draw:text-box>
        </draw:frame>
        <draw:frame draw:style-name="gr12" draw:text-style-name="P30" draw:layer="layout" svg:width="15.782cm" svg:height="10.543cm" svg:x="8.92cm" svg:y="1.847cm">
          <draw:image xlink:href="Pictures/10000000000003E80000029CAF438B60.jpg" xlink:type="simple" xlink:show="embed" xlink:actuate="onLoad" draw:mime-type="image/jpeg">
            <text:p/>
          </draw:image>
        </draw:frame>
        <draw:frame draw:style-name="gr58" draw:text-style-name="P95" draw:layer="layout" svg:width="6.848cm" svg:height="10.202cm" svg:x="0.65cm" svg:y="2.999cm">
          <draw:text-box>
            <text:p><text:span text:style-name="T86">Illustration de la différence entre les plates-formes et les bases de données.</text:span></text:p>
            <text:p><text:span text:style-name="T86">Couleur = accès institutionnel ; dans les colonnes -&gt; années disponibles en fonction accès institutionnel. </text:span></text:p>
            <text:p><text:span text:style-name="T86"/></text:p>
          </draw:text-box>
        </draw:frame>
        <draw:frame draw:style-name="gr59" draw:text-style-name="P94" draw:layer="layout" svg:width="23.972cm" svg:height="1.52cm" svg:x="0.527cm" svg:y="12.499cm">
          <draw:text-box>
            <text:p><text:span text:style-name="T22">Source : Haddaway, N. R., Rethlefsen, M. L., Davies, M., Glanville, J., McGowan, B., Nyhan, K., &amp; Young, S. (2022). A suggested data structure for transparent and repeatable reporting of bibliographic searching. </text:span><text:span text:style-name="T23">Campbell Systematic Reviews</text:span><text:span text:style-name="T22">, </text:span><text:span text:style-name="T23">18</text:span><text:span text:style-name="T22">(4), e1288. </text:span><text:span text:style-name="T22"><text:a xlink:href="https://doi.org/10.1002/cl2.1288" xlink:type="simple">https://doi.org/10.1002/cl2.1288</text:a></text:span></text:p>
          </draw:text-box>
        </draw:frame>
        <presentation:notes draw:style-name="dp4">
          <draw:page-thumbnail draw:name="Espace réservé de l'image des diapositives 27" draw:style-name="gr5" draw:layer="layout" svg:width="0.001cm" svg:height="0.001cm" svg:x="0cm" svg:y="2.257cm" draw:page-number="34" presentation:class="page"/>
          <draw:frame draw:name="Espace réservé des commentaires 25" presentation:style-name="pr76" draw:text-style-name="P10"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6" draw:layer="layout" svg:width="21.907cm" svg:height="2.761cm" svg:x="0.888cm" svg:y="0.023cm" presentation:class="title" presentation:user-transformed="true">
          <draw:text-box>
            <text:p text:style-name="P13"><text:span text:style-name="T7">Outils : critères de choix</text:span></text:p>
          </draw:text-box>
        </draw:frame>
        <draw:frame draw:name="Espace réservé du contenu 6" presentation:style-name="pr79" draw:text-style-name="P97" draw:layer="layout" svg:width="23.5cm" svg:height="12.718cm" svg:x="0.999cm" svg:y="2.699cm" presentation:class="outline" presentation:user-transformed="true">
          <draw:text-box>
            <text:list text:style-name="L13">
              <text:list-item>
                <text:p><text:span text:style-name="T87">Couverture </text:span></text:p>
              </text:list-item>
            </text:list>
            <text:list text:style-name="L23">
              <text:list-item>
                <text:list>
                  <text:list-item>
                    <text:p text:style-name="P96"><text:span text:style-name="T88">Disciplinaire</text:span></text:p>
                  </text:list-item>
                  <text:list-item>
                    <text:p text:style-name="P96"><text:span text:style-name="T88">Temporelle</text:span></text:p>
                  </text:list-item>
                  <text:list-item>
                    <text:p text:style-name="P96"><text:span text:style-name="T88">Géographique</text:span></text:p>
                  </text:list-item>
                  <text:list-item>
                    <text:p text:style-name="P96"><text:span text:style-name="T88">Types de documents indexés</text:span></text:p>
                  </text:list-item>
                </text:list>
              </text:list-item>
            </text:list>
            <text:list text:style-name="L13">
              <text:list-item>
                <text:p><text:span text:style-name="T87">Fonctionnalités</text:span></text:p>
              </text:list-item>
            </text:list>
            <text:list text:style-name="L23">
              <text:list-item>
                <text:list>
                  <text:list-item>
                    <text:p text:style-name="P96"><text:span text:style-name="T89">Caractère reproductible de la recherche (y compris documentation des options de recherche)</text:span></text:p>
                  </text:list-item>
                  <text:list-item>
                    <text:p text:style-name="P96"><text:span text:style-name="T89">Recherche avancée : nombre de champs et filtres, syntaxe et nombre de caractères pris en charge</text:span></text:p>
                  </text:list-item>
                  <text:list-item>
                    <text:p text:style-name="P96"><text:span text:style-name="T89">Historique de recherche</text:span></text:p>
                  </text:list-item>
                  <text:list-item>
                    <text:p text:style-name="P96"><text:span text:style-name="T89">Export (cf. diapo suiv)</text:span></text:p>
                  </text:list-item>
                  <text:list-item>
                    <text:p text:style-name="P96"><text:span text:style-name="T89">Recherche de citations</text:span></text:p>
                  </text:list-item>
                </text:list>
              </text:list-item>
            </text:list>
          </draw:text-box>
        </draw:frame>
        <draw:frame draw:style-name="gr12" draw:text-style-name="P30"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60" draw:text-style-name="P98" draw:layer="layout" svg:width="8.513cm" svg:height="1.373cm" svg:x="16.098cm" svg:y="6.63cm">
          <draw:text-box>
            <text:p text:style-name="P41"><text:span text:style-name="T90">https://www.searchsmart.org</text:span></text:p>
          </draw:text-box>
        </draw:frame>
        <presentation:notes draw:style-name="dp4">
          <draw:page-thumbnail draw:name="Espace réservé de l'image des diapositives 10" draw:style-name="gr5" draw:layer="layout" svg:width="0.001cm" svg:height="0.001cm" svg:x="0cm" svg:y="2.257cm" draw:page-number="35" presentation:class="page"/>
          <draw:frame draw:name="Espace réservé des commentaires 10" presentation:style-name="pr80" draw:text-style-name="P10"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17" presentation:style-name="pr78" draw:text-style-name="P76" draw:layer="layout" svg:width="21.907cm" svg:height="2.761cm" svg:x="0.888cm" svg:y="0.023cm" presentation:class="title" presentation:user-transformed="true">
          <draw:text-box>
            <text:p text:style-name="P13"><text:span text:style-name="T7">Outils : export des données</text:span></text:p>
          </draw:text-box>
        </draw:frame>
        <draw:frame draw:name="Espace réservé du contenu 12" presentation:style-name="pr82" draw:text-style-name="P99" draw:layer="layout" svg:width="22.813cm" svg:height="9.651cm" svg:x="0.999cm" svg:y="3.197cm" presentation:class="outline" presentation:user-transformed="true">
          <draw:text-box>
            <text:list text:style-name="L13">
              <text:list-item>
                <text:p><text:span text:style-name="T91">Fonctionnalité d’export</text:span></text:p>
              </text:list-item>
            </text:list>
            <text:list text:style-name="L23">
              <text:list-item>
                <text:list>
                  <text:list-item>
                    <text:p text:style-name="P96"><text:span text:style-name="T91">4 exemples concrets → voir stage Zotero pour les revues de littérature &gt; </text:span><text:span text:style-name="T91"><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91">Qualité des données exportées</text:span></text:p>
              </text:list-item>
            </text:list>
            <text:list text:style-name="L23">
              <text:list-item>
                <text:list>
                  <text:list-item>
                    <text:p text:style-name="P96"><text:span text:style-name="T20">Certains formats peuvent être plus riches que d'autres pour une même base de données → faire des tests et choisir le meilleur - ex du </text:span><text:span text:style-name="T21">Web of Science </text:span><text:span text:style-name="T92">(cf. diapo suivante)</text:span></text:p>
                  </text:list-item>
                  <text:list-item>
                    <text:p text:style-name="P96"><text:span text:style-name="T20">Données </text:span><text:span text:style-name="T21">lacunaires ou absentes</text:span><text:span text:style-name="T20"> → l'anticiper - exemple du résumé de </text:span><text:span text:style-name="T21">Google Scholar</text:span><text:span text:style-name="T20"> : le résumé est en fait généralement un extrait</text:span></text:p>
                  </text:list-item>
                </text:list>
              </text:list-item>
            </text:list>
          </draw:text-box>
        </draw:frame>
        <presentation:notes draw:style-name="dp4">
          <draw:page-thumbnail draw:name="Espace réservé de l'image des diapositives 16" draw:style-name="gr5" draw:layer="layout" svg:width="0.001cm" svg:height="0.001cm" svg:x="0cm" svg:y="2.257cm" draw:page-number="36" presentation:class="page"/>
          <draw:frame draw:name="Espace réservé des commentaires 14" presentation:style-name="pr83" draw:text-style-name="P10"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49" presentation:style-name="pr78" draw:text-style-name="P76" draw:layer="layout" svg:width="23.189cm" svg:height="2.761cm" svg:x="0.225cm" svg:y="-0.288cm" presentation:class="title" presentation:user-transformed="true">
          <draw:text-box>
            <text:p text:style-name="P13"><text:span text:style-name="T7">Outils : exports Web of Science</text:span></text:p>
          </draw:text-box>
        </draw:frame>
        <draw:frame draw:style-name="gr61" draw:text-style-name="P100" draw:layer="layout" svg:width="3.253cm" svg:height="1.41cm" svg:x="1.066cm" svg:y="2.89cm">
          <draw:text-box>
            <text:p><text:span text:style-name="T93">BibTex</text:span></text:p>
          </draw:text-box>
        </draw:frame>
        <draw:frame draw:style-name="gr62" draw:text-style-name="P27" draw:layer="layout" svg:width="6.911cm" svg:height="9.581cm" svg:x="1.066cm" svg:y="4.083cm">
          <draw:image xlink:href="Pictures/10000001000002C000000730DDC64086.png" xlink:type="simple" xlink:show="embed" xlink:actuate="onLoad" draw:mime-type="image/png">
            <text:p/>
          </draw:image>
        </draw:frame>
        <draw:frame draw:style-name="gr63" draw:text-style-name="P100" draw:layer="layout" svg:width="3.253cm" svg:height="1.597cm" svg:x="9.903cm" svg:y="2.261cm">
          <draw:text-box>
            <text:p><text:span text:style-name="T93">RIS</text:span></text:p>
          </draw:text-box>
        </draw:frame>
        <draw:frame draw:style-name="gr64" draw:text-style-name="P27" draw:layer="layout" svg:width="7.523cm" svg:height="10.311cm" svg:x="9.903cm" svg:y="3.457cm">
          <draw:image xlink:href="Pictures/10000001000002C60000079E2ABF0656.png" xlink:type="simple" xlink:show="embed" xlink:actuate="onLoad" draw:mime-type="image/png">
            <text:p/>
          </draw:image>
        </draw:frame>
        <draw:frame draw:style-name="gr65" draw:text-style-name="P101" draw:layer="layout" svg:width="5.542cm" svg:height="9.052cm" svg:x="18.939cm" svg:y="3.676cm">
          <draw:text-box>
            <text:p><text:span text:style-name="T94">Différences :</text:span></text:p>
            <text:list text:style-name="L1">
              <text:list-item>
                <text:p><text:span text:style-name="T94">prénom des auteurs,</text:span></text:p>
              </text:list-item>
              <text:list-item>
                <text:p><text:span text:style-name="T94">numéro,</text:span></text:p>
              </text:list-item>
              <text:list-item>
                <text:p><text:span text:style-name="T94">format de date.</text:span></text:p>
              </text:list-item>
            </text:list>
          </draw:text-box>
        </draw:frame>
        <presentation:notes draw:style-name="dp4">
          <draw:page-thumbnail draw:name="Espace réservé de l'image des diapositives 51" draw:style-name="gr5" draw:layer="layout" svg:width="0.001cm" svg:height="0.001cm" svg:x="0cm" svg:y="2.257cm" draw:page-number="37" presentation:class="page"/>
          <draw:frame draw:name="Espace réservé des commentaires 38" presentation:style-name="pr85" draw:text-style-name="P10"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8" draw:style-name="dp3" draw:master-page-name="Deux_20_contenus_5f_" presentation:presentation-page-layout-name="AL4T3" presentation:use-footer-name="ftr1">
        <office:forms form:automatic-focus="false" form:apply-design-mode="false"/>
        <draw:frame draw:name="Titre 52" presentation:style-name="pr78" draw:text-style-name="P76" draw:layer="layout" svg:width="21.907cm" svg:height="2.761cm" svg:x="0.591cm" svg:y="0.038cm" presentation:class="title" presentation:user-transformed="true">
          <draw:text-box>
            <text:p text:style-name="P13"><text:span text:style-name="T7">Outils : combien en choisir ?</text:span></text:p>
          </draw:text-box>
        </draw:frame>
        <draw:frame draw:name="Espace réservé du contenu 7" presentation:style-name="pr87" draw:text-style-name="P97" draw:layer="layout" svg:width="21.407cm" svg:height="12.752cm" svg:x="0.591cm" svg:y="3.116cm" presentation:class="outline" presentation:user-transformed="true">
          <draw:text-box>
            <text:list text:style-name="L13">
              <text:list-item>
                <text:p><text:span text:style-name="T95">Cochrane</text:span><text:span text:style-name="T87"> : au moins 2 bases de données principales - indications plus précises pour certains types de revue</text:span></text:p>
              </text:list-item>
              <text:list-item>
                <text:p><text:span text:style-name="T95">CEE</text:span><text:span text:style-name="T87"> : « </text:span><text:span text:style-name="T96">several</text:span><text:span text:style-name="T87"> »</text:span></text:p>
              </text:list-item>
              <text:list-item>
                <text:p><text:span text:style-name="T87">Management et domaines connexes : </text:span><text:span text:style-name="T95">au moins 3 bases de données principales</text:span><text:span text:style-name="T87"> pour la recherche par mots-clés</text:span></text:p>
              </text:list-item>
            </text:list>
            <text:list text:style-name="L23">
              <text:list-item>
                <text:list>
                  <text:list-item>
                    <text:p text:style-name="P96"><text:span text:style-name="T95">2 multidisciplinaires</text:span><text:span text:style-name="T87"> à couverture large - ex Web of Science, The Lens, etc.</text:span></text:p>
                  </text:list-item>
                  <text:list-item>
                    <text:p text:style-name="P96"><text:span text:style-name="T95">1 spécialisée</text:span><text:span text:style-name="T87"> dans le domaine, en fonction du sujet - ex PsycINFO en psychologie, Business Source Premier en management, etc.</text:span></text:p>
                  </text:list-item>
                  <text:list-item>
                    <text:p text:style-name="P96"><text:span text:style-name="T88">Voir : Gusenbauer, M., &amp; Gauster, S. P. (2025). How to search for literature in systematic reviews and meta-analyses : A comprehensive step-by-step guide. </text:span><text:span text:style-name="T97">Technological Forecasting and Social Change</text:span><text:span text:style-name="T88">, </text:span><text:span text:style-name="T97">212</text:span><text:span text:style-name="T88">, 123833. </text:span><text:span text:style-name="T88"><text:a xlink:href="https://doi.org/10.1016/j.techfore.2024.123833" xlink:type="simple">https://doi.org/10.1016/j.techfore.2024.123833</text:a></text:span><text:span text:style-name="T87"><text:s/></text:span></text:p>
                  </text:list-item>
                </text:list>
              </text:list-item>
            </text:list>
            <text:list text:style-name="L13">
              <text:list-item>
                <text:list>
                  <text:list-header>
                    <text:p><text:span text:style-name="T87"/></text:p>
                    <text:p><text:span text:style-name="T87"/></text:p>
                  </text:list-header>
                </text:list>
              </text:list-item>
            </text:list>
          </draw:text-box>
        </draw:frame>
        <presentation:notes draw:style-name="dp4">
          <draw:page-thumbnail draw:name="Espace réservé de l'image des diapositives 54" draw:style-name="gr5" draw:layer="layout" svg:width="0.001cm" svg:height="0.001cm" svg:x="0cm" svg:y="2.257cm" draw:page-number="38" presentation:class="page"/>
          <draw:frame draw:name="Espace réservé des commentaires 41" presentation:style-name="pr88" draw:text-style-name="P10"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3" draw:layer="layout" svg:width="11.448cm" svg:height="2.239cm" svg:x="0cm" svg:y="5.499cm" presentation:class="outline" presentation:user-transformed="true">
          <draw:text-box>
            <text:list text:style-name="L13">
              <text:list-header>
                <text:p text:style-name="P102"><text:span text:style-name="T98">« Tout le monde hait la littérature grise. »</text:span></text:p>
              </text:list-header>
            </text:list>
          </draw:text-box>
        </draw:frame>
        <draw:frame draw:name="Titre 36" presentation:style-name="pr12" draw:text-style-name="P22" draw:layer="layout" svg:width="11.448cm" svg:height="2.76cm" svg:x="0.551cm" svg:y="1.699cm" presentation:class="title" presentation:user-transformed="true">
          <draw:text-box>
            <text:p text:style-name="P13"><text:span text:style-name="T7">Le cas de la littérature grise</text:span><text:span text:style-name="T7"><text:line-break/></text:span><text:span text:style-name="T7"/></text:p>
          </draw:text-box>
        </draw:frame>
        <draw:custom-shape draw:name="Rectangle 136" draw:style-name="gr66" draw:text-style-name="P105" draw:layer="layout" svg:width="12.101cm" svg:height="9.718cm" svg:x="11.999cm" svg:y="1.7cm">
          <text:p text:style-name="P104"><text:span text:style-name="T9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87" draw:layer="layout" svg:width="11.5cm" svg:height="2.195cm" svg:x="11.999cm" svg:y="11.999cm">
          <draw:text-box>
            <text:p text:style-name="P47"><text:span text:style-name="T22">Source : Hickner, A. (2023). How do search systems impact systematic searching? A qualitative study. </text:span><text:span text:style-name="T23">Journal of the Medical Library Association</text:span><text:span text:style-name="T22">, </text:span><text:span text:style-name="T23">111</text:span><text:span text:style-name="T22">(4), 4. </text:span><text:span text:style-name="T22"><text:a xlink:href="https://doi.org/10.5195/jmla.2023.1647" xlink:type="simple">https://doi.org/10.5195/jmla.2023.1647</text:a></text:span><text:span text:style-name="T22"><text:s/></text:span></text:p>
          </draw:text-box>
        </draw:frame>
        <presentation:notes draw:style-name="dp4">
          <draw:page-thumbnail draw:name="Espace réservé de l'image des diapositives 35" draw:style-name="gr5" draw:layer="layout" svg:width="0.001cm" svg:height="0.001cm" svg:x="0cm" svg:y="2.257cm" draw:page-number="39" presentation:class="page"/>
          <draw:frame draw:name="Espace réservé des commentaires 29" presentation:style-name="pr90" draw:text-style-name="P10"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32" draw:layer="layout" svg:width="21.907cm" svg:height="5.942cm" svg:x="1.729cm" svg:y="3.359cm" presentation:class="title" presentation:user-transformed="true">
          <draw:text-box>
            <text:p text:style-name="P31"><text:span text:style-name="T1">Construction d’une équation de recherche</text:span></text:p>
          </draw:text-box>
        </draw:frame>
        <draw:frame draw:name="Espace réservé du texte 4" presentation:style-name="pr15" draw:text-style-name="P107" draw:layer="layout" svg:width="21.907cm" svg:height="3.986cm" svg:x="1.729cm" svg:y="9.159cm" presentation:class="outline" presentation:user-transformed="true">
          <draw:text-box>
            <text:p text:style-name="P106"><text:span text:style-name="T19">Équation de recherche complexe = logique AND opérateur* AND ("mots-clés" OR keyword$)</text:span></text:p>
            <text:p text:style-name="P2"><text:span text:style-name="T19">Valider, améliorer et adapter une équation</text:span></text:p>
            <text:p text:style-name="P90"><text:span text:style-name="T19"/></text:p>
          </draw:text-box>
        </draw:frame>
        <draw:g draw:name="Keywords 3" draw:style-name="gr13">
          <draw:custom-shape draw:name="Rectangle 65"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5" draw:layer="layout" svg:width="0.001cm" svg:height="0.001cm" svg:x="0cm" svg:y="2.257cm" draw:page-number="40" presentation:class="page"/>
          <draw:frame draw:name="Espace réservé des commentaires 5" presentation:style-name="pr92" draw:text-style-name="P10"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4" draw:layer="layout" svg:width="25.027cm" svg:height="2.761cm" svg:x="0.999cm" svg:y="0.499cm" presentation:class="title" presentation:user-transformed="true">
          <draw:text-box>
            <text:p text:style-name="P13"><text:span text:style-name="T7">Rappels </text:span></text:p>
          </draw:text-box>
        </draw:frame>
        <draw:frame draw:style-name="gr68" draw:text-style-name="P108" draw:layer="layout" svg:width="23.441cm" svg:height="8.514cm" svg:x="1.057cm" svg:y="3.556cm">
          <draw:text-box>
            <text:p><text:span text:style-name="T100">Équation de recherche complexe = logique AND opérateur* AND (</text:span><text:span text:style-name="T101">"mots-clés" OR keyword$)</text:span></text:p>
            <text:p><text:span text:style-name="T102"/></text:p>
            <text:list text:style-name="L24">
              <text:list-item>
                <text:p><text:span text:style-name="T102">Logique et opérateurs booléens</text:span></text:p>
              </text:list-item>
              <text:list-item>
                <text:p><text:span text:style-name="T102">Opérateurs linguistiques et de proximité</text:span></text:p>
              </text:list-item>
              <text:list-item>
                <text:p><text:span text:style-name="T102">Mots-clés</text:span></text:p>
              </text:list-item>
            </text:list>
            <text:list text:style-name="L25">
              <text:list-header>
                <text:p><text:span text:style-name="T102">→ Syntaxe et vocabulaire</text:span></text:p>
              </text:list-header>
            </text:list>
          </draw:text-box>
        </draw:frame>
        <presentation:notes draw:style-name="dp4">
          <draw:page-thumbnail draw:name="Espace réservé de l'image des diapositives 11" draw:style-name="gr5" draw:layer="layout" svg:width="0.001cm" svg:height="0.001cm" svg:x="0cm" svg:y="2.257cm" draw:page-number="41" presentation:class="page"/>
          <draw:frame draw:name="Espace réservé des notes 2" presentation:style-name="pr94" draw:text-style-name="P10"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58" presentation:style-name="pr93" draw:text-style-name="P14" draw:layer="layout" svg:width="25.027cm" svg:height="2.761cm" svg:x="0.972cm" svg:y="0.238cm" presentation:class="title" presentation:user-transformed="true">
          <draw:text-box>
            <text:p text:style-name="P13"><text:span text:style-name="T7">Rappels : testons nos connaissances</text:span></text:p>
          </draw:text-box>
        </draw:frame>
        <draw:frame draw:style-name="gr69" draw:text-style-name="P109" draw:layer="layout" svg:width="23.441cm" svg:height="10.811cm" svg:x="0.972cm" svg:y="2.699cm">
          <draw:text-box>
            <text:p><text:span text:style-name="T103">De quel sujet cette équation de recherche est-elle la traduction ? Quels éléments de syntaxe reconnaissez-vous ? En manque-t-il ?</text:span></text:p>
            <text:p><text:span text:style-name="T103"/></text:p>
            <text:p><text:span text:style-name="T103">(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5" draw:layer="layout" svg:width="0.001cm" svg:height="0.001cm" svg:x="0cm" svg:y="2.257cm" draw:page-number="42" presentation:class="page"/>
          <draw:frame draw:name="Espace réservé des notes 17" presentation:style-name="pr96" draw:text-style-name="P10"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5" draw:style-name="gr70" draw:text-style-name="P111" draw:layer="layout" svg:width="22.726cm" svg:height="1.775cm" svg:x="0.773cm" svg:y="0.399cm">
          <text:p text:style-name="P110"><text:span text:style-name="T7">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71" draw:text-style-name="P7" draw:layer="layout" svg:width="23.051cm" svg:height="12.284cm" svg:x="0.947cm" svg:y="2.5cm">
          <text:p text:style-name="P23"><text:span text:style-name="T61">La démarche consiste à traduire une phrase en </text:span><text:span text:style-name="T104">langage naturel</text:span><text:span text:style-name="T105"> </text:span><text:span text:style-name="T61">telle que la suivante :</text:span></text:p>
          <text:p text:style-name="P23"><text:span text:style-name="T61"/></text:p>
          <text:p text:style-name="P23"><text:span text:style-name="T106">Quel est l’impact de la cigarette électronique sur le tabagisme?</text:span></text:p>
          <text:p text:style-name="P23"><text:span text:style-name="T107"/></text:p>
          <text:p text:style-name="P23"><text:span text:style-name="T107">en une phrase qui puisse être </text:span><text:span text:style-name="T108">comprise par un outil de recherche documentaire</text:span><text:span text:style-name="T107">, telle que celle-ci :</text:span></text:p>
          <text:p text:style-name="P23"><text:span text:style-name="T107"/></text:p>
          <text:p text:style-name="P112"><text:span text:style-name="T106">("cigarette électronique" OU "e-cigarette" OU vapoter) ET (tabagisme OU "dépendance au tabac" OU "tabaco-dépendance" OU tabacodépendance) </text:span></text:p>
          <text:p text:style-name="P23"><text:span text:style-name="T107">-&gt; Quelles différences observez-vous entre les 2?</text:span></text:p>
          <text:p text:style-name="P23"><text:span text:style-name="T10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5" draw:layer="layout" svg:width="0.001cm" svg:height="0.001cm" svg:x="0cm" svg:y="2.257cm" draw:page-number="43" presentation:class="page"/>
          <draw:frame draw:name="Espace réservé des commentaires 24" presentation:style-name="pr98" draw:text-style-name="P10"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1" draw:style-name="gr72" draw:text-style-name="P7" draw:layer="layout" svg:width="24.047cm" svg:height="2.113cm" svg:x="0.951cm" svg:y="0.087cm">
          <text:p text:style-name="P23"><text:span text:style-name="T109">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3" draw:text-style-name="P7" draw:layer="layout" svg:width="23.88cm" svg:height="4.993cm" svg:x="1.12cm" svg:y="2.5cm">
          <text:p text:style-name="P23"><text:span text:style-name="T110">Quel est l’impact de la cigarette électronique sur le tabagisme?</text:span></text:p>
          <text:p text:style-name="P23"><text:span text:style-name="T110">-&gt;</text:span></text:p>
          <text:p text:style-name="P23"><text:span text:style-name="T110">("cigarette électronique" OU "e-cigarette" OU vapotage OU vapoter) ET (tabagisme OU "dépendance au tabac" OU "tabaco-dépendance" OU tabacodépendance) </text:span></text:p>
          <text:p text:style-name="P23"><text:span text:style-name="T107"/></text:p>
          <text:p text:style-name="P23"><text:span text:style-name="T1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113" draw:layer="layout" svg:width="20.204cm" svg:height="7.568cm" svg:x="0.999cm" svg:y="5.999cm">
          <draw:text-box>
            <text:p><text:span text:style-name="T86">Comment passe-t-on de l’une à l’autre?</text:span></text:p>
            <text:list text:style-name="L1">
              <text:list-item>
                <text:p><text:span text:style-name="T112">Réduction aux concepts clés</text:span><text:span text:style-name="T86"> : analyser le sujet, identifier les concepts et les notions derrière les mots</text:span></text:p>
              </text:list-item>
              <text:list-item>
                <text:p><text:span text:style-name="T112">Réduction des relations entre les termes à la logique booléenne</text:span><text:span text:style-name="T86"> : éliminer les termes dont la signification peut être épuisée par OU ou ET, identifier des mots-clés pour les autres termes</text:span></text:p>
              </text:list-item>
              <text:list-item>
                <text:p><text:span text:style-name="T112">Explicitation de l’implicite</text:span><text:span text:style-name="T86"> : ajouter des synonymes, des variantes et équivalents, marquer les chaînes de caractère</text:span></text:p>
              </text:list-item>
            </text:list>
          </draw:text-box>
        </draw:frame>
        <presentation:notes draw:style-name="dp4">
          <draw:page-thumbnail draw:name="Espace réservé de l'image des diapositives 29" draw:style-name="gr5" draw:layer="layout" svg:width="0.001cm" svg:height="0.001cm" svg:x="0cm" svg:y="2.257cm" draw:page-number="44" presentation:class="page"/>
          <draw:frame draw:name="Espace réservé des commentaires 27" presentation:style-name="pr100" draw:text-style-name="P10"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5" draw:style-name="dp3" draw:master-page-name="Titre_20_et_20_contenu_5f_" presentation:presentation-page-layout-name="AL2T11" presentation:use-footer-name="ftr1">
        <office:forms form:automatic-focus="false" form:apply-design-mode="false"/>
        <draw:custom-shape draw:name="Text Box 20" draw:style-name="gr75" draw:text-style-name="P7" draw:layer="layout" svg:width="19.048cm" svg:height="2.113cm" svg:x="2.103cm" svg:y="0.195cm">
          <text:p text:style-name="P23"><text:span text:style-name="T109">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6" draw:text-style-name="P115" draw:layer="layout" svg:width="20.266cm" svg:height="3.352cm" svg:x="2.09cm" svg:y="2.753cm">
          <text:p text:style-name="P114"><text:span text:style-name="T113">LES GUILLEMETS : </text:span><text:span text:style-name="T114">pour rechercher une</text:span><text:span text:style-name="T113"> expression exacte</text:span></text:p>
          <text:p text:style-name="P114"><text:span text:style-name="T113"><text:tab/></text:span><text:span text:style-name="T113">"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3">
          <draw:custom-shape draw:name="Freeform 7" draw:style-name="gr77" draw:text-style-name="P116"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8" draw:text-style-name="P116"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9" draw:text-style-name="P119" draw:layer="layout" svg:width="20.266cm" svg:height="6.269cm" svg:x="2.191cm" svg:y="6.83cm">
          <text:p text:style-name="P117"><text:span text:style-name="T113">LES PARENTHESES : </text:span><text:span text:style-name="T114">pour structurer sa requête</text:span></text:p>
          <text:p text:style-name="P118"><text:span text:style-name="T114">("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7ADD5367.png" xlink:type="simple" xlink:show="embed" xlink:actuate="onLoad" draw:mime-type="image/png">
            <text:p/>
          </draw:image>
        </draw:frame>
        <presentation:notes draw:style-name="dp4">
          <draw:page-thumbnail draw:name="Espace réservé de l'image des diapositives 43" draw:style-name="gr5" draw:layer="layout" svg:width="0.001cm" svg:height="0.001cm" svg:x="0cm" svg:y="2.257cm" draw:page-number="45" presentation:class="page"/>
          <draw:frame draw:name="Espace réservé des commentaires 34" presentation:style-name="pr102" draw:text-style-name="P10"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6" draw:style-name="dp3" draw:master-page-name="Vide_5f_" presentation:use-footer-name="ftr1">
        <office:forms form:automatic-focus="false" form:apply-design-mode="false"/>
        <draw:custom-shape draw:name="Forme libre 1" draw:style-name="gr80" draw:text-style-name="P122" draw:layer="layout" svg:width="23.388cm" svg:height="8.675cm" svg:x="1.111cm" svg:y="2.9cm">
          <text:p text:style-name="P118"><text:span text:style-name="T113"><text:tab/></text:span><text:span text:style-name="T115">LA TRONCATURE</text:span></text:p>
          <text:p text:style-name="P120"><text:span text:style-name="T116"><text:tab/></text:span><text:span text:style-name="T115">remplace de 0 à n caractères</text:span></text:p>
          <text:p text:style-name="P120"><text:span text:style-name="T116"><text:tab/></text:span><text:span text:style-name="T116">permet de retrouver toutes les variantes d’un terme (singulier/pluriel, nom/adjectif/verbe, etc.)</text:span></text:p>
          <text:p text:style-name="P121"><text:span text:style-name="T115"><text:tab/></text:span><text:span text:style-name="T115">child* </text:span><text:span text:style-name="T117"></text:span><text:span text:style-name="T115"> </text:span><text:span text:style-name="T116">child + children + childhood + childish, etc.</text:span></text:p>
          <text:p text:style-name="P121"><text:span text:style-name="T115"><text:tab/></text:span><text:span text:style-name="T115">preven*</text:span><text:span text:style-name="T117"></text:span><text:span text:style-name="T115"> </text:span><text:span text:style-name="T116">prevention + preventions + prevent + preventive, etc.</text:span></text:p>
          <text:p text:style-name="P121"><text:span text:style-name="T117"></text:span><text:span text:style-name="T115"> </text:span><text:span text:style-name="T116">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81" draw:text-style-name="P123" draw:layer="layout" svg:width="2.437cm" svg:height="2.437cm" svg:x="1.562cm" svg:y="3.499cm">
          <draw:image xlink:href="Pictures/1000000100000100000001002211A91E.png" xlink:type="simple" xlink:show="embed" xlink:actuate="onLoad" draw:mime-type="image/png">
            <text:p/>
          </draw:image>
        </draw:frame>
        <draw:custom-shape draw:name="Rectangle 137" draw:style-name="gr82" draw:text-style-name="P7" draw:layer="layout" svg:width="19.185cm" svg:height="2.113cm" svg:x="1.061cm" svg:y="0.5cm">
          <text:p text:style-name="P23"><text:span text:style-name="T118">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71" draw:layer="layout" svg:width="21.679cm" svg:height="4.147cm" svg:x="1.109cm" svg:y="11.752cm">
          <draw:text-box>
            <text:p><text:span text:style-name="T119">/!\ </text:span><text:span text:style-name="T120">Tous ces éléments de syntaxe, </text:span><text:span text:style-name="T121"><text:s/>de même que les</text:span><text:span text:style-name="T122"> champs de recherche</text:span><text:span text:style-name="T121">,</text:span><text:span text:style-name="T122"> </text:span><text:span text:style-name="T121">varient d’un outil de recherche à l’autre.</text:span></text:p>
          </draw:text-box>
        </draw:frame>
        <presentation:notes draw:style-name="dp4">
          <draw:page-thumbnail draw:name="Espace réservé de l'image des diapositives 44" draw:style-name="gr5" draw:layer="layout" svg:width="0.001cm" svg:height="0.001cm" svg:x="0cm" svg:y="2.257cm" draw:page-number="46" presentation:class="page"/>
          <draw:frame draw:name="Espace réservé des commentaires 35" presentation:style-name="pr104" draw:text-style-name="P10"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3" presentation:style-name="pr93" draw:text-style-name="P14" draw:layer="layout" svg:width="25.233cm" svg:height="2.761cm" svg:x="0.999cm" svg:y="0cm" presentation:class="title" presentation:user-transformed="true">
          <draw:text-box>
            <text:p text:style-name="P13"><text:span text:style-name="T7">Rappels : exercice</text:span></text:p>
          </draw:text-box>
        </draw:frame>
        <draw:custom-shape draw:name="ZoneTexte 7" draw:style-name="gr84" draw:text-style-name="P125" draw:layer="layout" svg:width="23.499cm" svg:height="11.423cm" svg:x="0.999cm" svg:y="2.558cm">
          <text:p text:style-name="P124"><text:span text:style-name="T123">A partir des mots-clés ci-dessous, quelle combinaison proposez-vous pour le sujet suivant : </text:span><text:span text:style-name="T124">« la participation aux arts comme comportement de santé : le rôle des arts dans la prévention des maladies non transmissibles »</text:span><text:span text:style-name="T123">? <text:s/>Vous pouvez ajouter des mots-clés supplémentaires.</text:span></text:p>
          <text:p text:style-name="P124"><text:span text:style-name="T123"/></text:p>
          <text:list text:style-name="L26">
            <text:list-item>
              <text:p text:style-name="P124"><text:span text:style-name="T123">art</text:span></text:p>
            </text:list-item>
            <text:list-item>
              <text:p text:style-name="P124"><text:span text:style-name="T123">cancer</text:span></text:p>
            </text:list-item>
            <text:list-item>
              <text:p text:style-name="P124"><text:span text:style-name="T123">dementia</text:span></text:p>
            </text:list-item>
            <text:list-item>
              <text:p text:style-name="P124"><text:span text:style-name="T123">diabete</text:span></text:p>
            </text:list-item>
            <text:list-item>
              <text:p text:style-name="P124"><text:span text:style-name="T123">participation</text:span></text:p>
            </text:list-item>
            <text:list-item>
              <text:p text:style-name="P124"><text:span text:style-name="T123">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5" draw:layer="layout" svg:width="0.001cm" svg:height="0.001cm" svg:x="0cm" svg:y="2.257cm" draw:page-number="47" presentation:class="page"/>
          <draw:frame draw:name="Espace réservé des notes 4" presentation:style-name="pr106" draw:text-style-name="P10"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4" presentation:style-name="pr93" draw:text-style-name="P14" draw:layer="layout" svg:width="25.233cm" svg:height="2.761cm" svg:x="0.499cm" svg:y="0.238cm" presentation:class="title" presentation:user-transformed="true">
          <draw:text-box>
            <text:p text:style-name="P13"><text:span text:style-name="T7">Valider une équation de recherche</text:span></text:p>
          </draw:text-box>
        </draw:frame>
        <draw:custom-shape draw:name="ZoneTexte 8" draw:style-name="gr85" draw:text-style-name="P128" draw:layer="layout" svg:width="22.332cm" svg:height="11.763cm" svg:x="0.666cm" svg:y="2.455cm">
          <text:p text:style-name="P126"><text:span text:style-name="T123">2 contrôles de qualité</text:span></text:p>
          <text:list text:style-name="L26">
            <text:list-item>
              <text:p text:style-name="P126"><text:span text:style-name="T123">Avant la recherche systématique : la </text:span><text:span text:style-name="T124">liste de contrôle</text:span><text:span text:style-name="T123"> (</text:span><text:span text:style-name="T125">gold standard, benchmark list</text:span><text:span text:style-name="T123">) = articles pertinents sélectionnés manuellement, pour valider la </text:span><text:span text:style-name="T124">stratégie</text:span><text:span text:style-name="T123"> de recherche par mots-clés</text:span></text:p>
            </text:list-item>
            <text:list-item>
              <text:p text:style-name="P126"><text:span text:style-name="T123">Au début de la recherche systématique : le </text:span><text:span text:style-name="T124">NNR</text:span><text:span text:style-name="T123"> (</text:span><text:span text:style-name="T126">Number needed to read</text:span><text:span text:style-name="T123">), pour valider la </text:span><text:span text:style-name="T124">profondeur</text:span><text:span text:style-name="T123"> de la recherche</text:span></text:p>
            </text:list-item>
          </text:list>
          <text:list text:style-name="L27">
            <text:list-item>
              <text:list>
                <text:list-item>
                  <text:p text:style-name="P127"><text:span text:style-name="T127">Bons résultats avec valeurs </text:span><text:span text:style-name="T128">entre 8,3 et 73</text:span></text:p>
                </text:list-item>
                <text:list-item>
                  <text:p text:style-name="P127"><text:span text:style-name="T127">Médiane constatée en sciences de gestion : 27,02</text:span></text:p>
                </text:list-item>
                <text:list-item>
                  <text:p text:style-name="P127"><text:span text:style-name="T127">Recherche probablement trop imprécise si NNR &gt; 100 et trop peu restreinte si NRR &lt; 8</text:span></text:p>
                </text:list-item>
              </text:list>
            </text:list-item>
          </text:list>
          <text:p text:style-name="P126"><text:span text:style-name="T123"/></text:p>
          <text:p text:style-name="P126"><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87" draw:layer="layout" svg:width="23.832cm" svg:height="2.966cm" svg:x="0.666cm" svg:y="12.499cm">
          <draw:text-box>
            <text:p text:style-name="P47"><text:span text:style-name="T130">Voir : Gusenbauer, M., &amp; Gauster, S. P. (2025). How to search for literature in systematic reviews and meta-analyses : A comprehensive step-by-step guide. </text:span><text:span text:style-name="T131">Technological Forecasting and Social Change</text:span><text:span text:style-name="T130">, </text:span><text:span text:style-name="T131">212</text:span><text:span text:style-name="T130">, 123833. </text:span><text:span text:style-name="T130"><text:a xlink:href="https://doi.org/10.1016/j.techfore.2024.123833" xlink:type="simple">https://doi.org/10.1016/j.techfore.2024.123833</text:a></text:span><text:span text:style-name="T130"><text:s/>- notamment tableau 2 et supll info 5 </text:span></text:p>
          </draw:text-box>
        </draw:frame>
        <presentation:notes draw:style-name="dp4">
          <draw:page-thumbnail draw:name="Espace réservé de l'image des diapositives 33" draw:style-name="gr5" draw:layer="layout" svg:width="0.001cm" svg:height="0.001cm" svg:x="0cm" svg:y="2.257cm" draw:page-number="48" presentation:class="page"/>
          <draw:frame draw:name="Espace réservé des notes 5" presentation:style-name="pr108" draw:text-style-name="P10"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18" draw:style-name="gr87" draw:text-style-name="P128" draw:layer="layout" svg:width="22.226cm" svg:height="10.326cm" svg:x="1.525cm" svg:y="3.591cm">
          <text:p text:style-name="P126"><text:span text:style-name="T129">#1 est l’équation à tester et #2 l’équation retrouvant tous les articles de la liste de contrôle, </text:span><text:span text:style-name="T132">i. e.</text:span><text:span text:style-name="T129"> la concaténation des DOI et/ou des titres.</text:span></text:p>
          <text:p text:style-name="P126"><text:span text:style-name="T129"/></text:p>
          <text:p text:style-name="P126"><text:span text:style-name="T129">L’équation retrouve tous les articles de la liste de contrôle quand :</text:span></text:p>
          <text:p text:style-name="P126"><text:span text:style-name="T129"/></text:p>
          <text:p text:style-name="P126"><text:span text:style-name="T133">#1 AND #2</text:span><text:span text:style-name="T129"> → le résultat est égal au nombre d’articles de la liste de contrôle</text:span></text:p>
          <text:p text:style-name="P126"><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5" draw:layer="layout" svg:width="0.001cm" svg:height="0.001cm" svg:x="0cm" svg:y="2.257cm" draw:page-number="49" presentation:class="page"/>
          <draw:frame draw:name="Espace réservé des notes 11" presentation:style-name="pr110" draw:text-style-name="P10"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5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24" draw:style-name="gr88" draw:text-style-name="P128" draw:layer="layout" svg:width="23.832cm" svg:height="11.171cm" svg:x="0.666cm" svg:y="2.999cm">
          <text:p text:style-name="P126"><text:span text:style-name="T123">Exemple dans </text:span><text:span text:style-name="T123"><text:a xlink:href="https://www.lens.org/lens/search/scholar/structured" xlink:type="simple">The Lens</text:a></text:span></text:p>
          <text:p text:style-name="P126"><text:span text:style-name="T123">Rechercher dans le champ résumé :</text:span></text:p>
          <text:p text:style-name="P126"><text:span text:style-name="T127">(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3"><text:s/></text:span></text:p>
          <text:p text:style-name="P126"><text:span text:style-name="T123"/></text:p>
          <text:p text:style-name="P126"><text:span text:style-name="T123">Et dans le champ DOI : </text:span></text:p>
          <text:p text:style-name="P126"><text:span text:style-name="T127">("10.1007/978-3-032-01817-5_6" OR "10.3390/healthcare13233171" OR "10.51583/ijltemas.2025.1411000026" OR " 10.1088/1402-4896/ae26f4" OR "10.1007/s43621-025-02127-3") </text:span></text:p>
          <text:p text:style-name="P126"><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2" draw:style-name="gr5" draw:layer="layout" svg:width="0.001cm" svg:height="0.001cm" svg:x="0cm" svg:y="2.257cm" draw:page-number="50" presentation:class="page"/>
          <draw:frame draw:name="Espace réservé des notes 19" presentation:style-name="pr112" draw:text-style-name="P10"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1" draw:style-name="dp3" draw:master-page-name="Deux_20_contenus_5f_" presentation:presentation-page-layout-name="AL4T3" presentation:use-footer-name="ftr1">
        <office:forms form:automatic-focus="false" form:apply-design-mode="false"/>
        <draw:frame draw:name="Titre 32" presentation:style-name="pr93" draw:text-style-name="P14" draw:layer="layout" svg:width="23.706cm" svg:height="2.761cm" svg:x="0.499cm" svg:y="-0.06cm" presentation:class="title" presentation:user-transformed="true">
          <draw:text-box>
            <text:p text:style-name="P13"><text:span text:style-name="T7">Recherche documentaire et efficacité</text:span></text:p>
          </draw:text-box>
        </draw:frame>
        <draw:g draw:name="Diagramme 1" draw:style-name="gr13">
          <draw:custom-shape draw:style-name="gr89"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0" draw:text-style-name="P130" draw:layer="layout" svg:width="11.093cm" svg:height="5.852cm" svg:x="2.531cm" svg:y="4.3cm">
            <text:p text:style-name="P129"><text:span text:style-name="T134">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1" draw:text-style-name="P132" draw:layer="layout" svg:width="10.636cm" svg:height="5.642cm" svg:x="10.364cm" svg:y="4.367cm">
            <text:p text:style-name="P131"><text:span text:style-name="T135">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2" draw:text-style-name="P7" draw:layer="layout" svg:width="6.688cm" svg:height="2.283cm" svg:x="0.719cm" svg:y="2.584cm">
          <text:p text:style-name="P23"><text:span text:style-name="T136">Silence</text:span><text:span text:style-name="T1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3" draw:text-style-name="P134" draw:layer="layout" svg:width="5.358cm" svg:height="1.606cm" svg:x="19.405cm" svg:y="3.078cm">
          <text:p text:style-name="P133"><text:span text:style-name="T136">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4" draw:text-style-name="P136" draw:layer="layout" svg:width="8.839cm" svg:height="1.437cm" svg:x="9.098cm" svg:y="2.461cm">
          <text:p text:style-name="P135"><text:span text:style-name="T70">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5" draw:text-style-name="P5" draw:layer="layout" draw:type="line" svg:x1="12.13cm" svg:y1="4.033cm" svg:x2="12.179cm" svg:y2="8.555cm" svg:d="M12130 4033l49 4522" svg:viewBox="0 0 50 4523">
          <text:p/>
        </draw:connector>
        <draw:custom-shape draw:name="Arrow 2" draw:style-name="gr96" draw:text-style-name="P137"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7" draw:text-style-name="P138" draw:layer="layout" svg:width="25.5cm" svg:height="2.146cm" svg:x="0.499cm" svg:y="12.002cm">
          <draw:text-box>
            <text:p><text:span text:style-name="T138">Définir un objectif équilibré en termes de </text:span><text:span text:style-name="T139">précision</text:span><text:span text:style-name="T138"> et de </text:span><text:span text:style-name="T139">sensibilité</text:span><text:span text:style-name="T138"> </text:span></text:p>
            <text:p><text:span text:style-name="T138">→ on ne peut pas avoir les 2 en même temps...</text:span></text:p>
          </draw:text-box>
        </draw:frame>
        <presentation:notes draw:style-name="dp4">
          <draw:page-thumbnail draw:name="Espace réservé de l'image des diapositives 31" draw:style-name="gr5" draw:layer="layout" svg:width="0.001cm" svg:height="0.001cm" svg:x="0cm" svg:y="2.257cm" draw:page-number="51" presentation:class="page"/>
          <draw:frame draw:name="Espace réservé des notes 3" presentation:style-name="pr114" draw:text-style-name="P10"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40"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39"><text:span text:style-name="T140"> </text:span></text:p>
              </table:table-cell>
              <table:table-cell>
                <text:p text:style-name="P140"><text:span text:style-name="T140">Contre le bruit</text:span></text:p>
              </table:table-cell>
              <table:table-cell>
                <text:p text:style-name="P140"><text:span text:style-name="T140">Contre le silence</text:span></text:p>
              </table:table-cell>
            </table:table-row>
            <table:table-row table:style-name="ro5" table:default-cell-style-name="ce11">
              <table:table-cell table:style-name="ce10">
                <text:p text:style-name="P139"><text:span text:style-name="T140">Mots-clés </text:span></text:p>
              </table:table-cell>
              <table:table-cell>
                <text:p text:style-name="P141"><text:span text:style-name="T63">Vérifier la bonne combinaison des mots-clés avec les opérateurs booléens </text:span></text:p>
                <text:p text:style-name="P141"><text:span text:style-name="T141">Ajouter un concept</text:span></text:p>
                <text:p text:style-name="P141"><text:span text:style-name="T63">Utiliser des mots-clés rares, discriminants et </text:span><text:span text:style-name="T141">spécifiques</text:span><text:span text:style-name="T63">, les moins polysémiques possibles </text:span></text:p>
              </table:table-cell>
              <table:table-cell>
                <text:p text:style-name="P141"><text:span text:style-name="T63">Vérifier la bonne combinaison des mots-clés avec les opérateurs booléens</text:span></text:p>
                <text:p text:style-name="P141"><text:span text:style-name="T141">Supprimer un ou plusieurs des concepts </text:span><text:span text:style-name="T63">sur lesquels porte votre recherche</text:span></text:p>
                <text:p text:style-name="P141"><text:span text:style-name="T63">Ajouter des </text:span><text:span text:style-name="T141">synonymes</text:span><text:span text:style-name="T63"> aux mots-clés de votre recherche </text:span></text:p>
                <text:p text:style-name="P141"><text:span text:style-name="T63">Utiliser des mots-clés plus génériques </text:span></text:p>
              </table:table-cell>
            </table:table-row>
            <table:table-row table:style-name="ro6" table:default-cell-style-name="ce12">
              <table:table-cell table:style-name="ce10">
                <text:p text:style-name="P139"><text:span text:style-name="T140">Choix de l’outil de recherche</text:span></text:p>
              </table:table-cell>
              <table:table-cell>
                <text:p text:style-name="P141"><text:span text:style-name="T63">Choisir un outil de recherche à la </text:span><text:span text:style-name="T141">couverture disciplinaire plus restreinte </text:span></text:p>
                <text:p text:style-name="P141"><text:span text:style-name="T63">Choisir un outil de recherche à la couverture adaptée à votre sujet</text:span></text:p>
              </table:table-cell>
              <table:table-cell>
                <text:p text:style-name="P141"><text:span text:style-name="T63">Choisir un outil de recherche à la </text:span><text:span text:style-name="T141">couverture disciplinaire plus large</text:span></text:p>
                <text:p text:style-name="P141"><text:span text:style-name="T63">Choisir un outil de recherche à la couverture adaptée à votre sujet</text:span></text:p>
              </table:table-cell>
            </table:table-row>
            <table:table-row table:style-name="ro6" table:default-cell-style-name="ce11">
              <table:table-cell table:style-name="ce10">
                <text:p text:style-name="P139"><text:span text:style-name="T140">Utilisation de l’outil de recherche</text:span></text:p>
              </table:table-cell>
              <table:table-cell>
                <text:p text:style-name="P141"><text:span text:style-name="T63">Vérifier le respect de la syntaxe et de la langue d’interrogation</text:span></text:p>
                <text:p text:style-name="P141"><text:span text:style-name="T141">Préciser</text:span><text:span text:style-name="T63"> les critères d’interrogation (champs de recherche)</text:span></text:p>
              </table:table-cell>
              <table:table-cell>
                <text:p text:style-name="P141"><text:span text:style-name="T63">Vérifier le respect de la syntaxe et de la langue d’interrogation</text:span></text:p>
                <text:p text:style-name="P141"><text:span text:style-name="T141">Élargir</text:span><text:span text:style-name="T63">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2" draw:layer="layout" svg:width="23.996cm" svg:height="1.952cm" svg:x="0.885cm" svg:y="0.171cm" presentation:class="title" presentation:user-transformed="true">
          <draw:text-box>
            <text:p text:style-name="P13"><text:span text:style-name="T7">Améliorer une équation de recherche</text:span></text:p>
          </draw:text-box>
        </draw:frame>
        <presentation:notes draw:style-name="dp4">
          <draw:page-thumbnail draw:name="Espace réservé de l'image des diapositives 12" draw:style-name="gr5" draw:layer="layout" svg:width="0.001cm" svg:height="0.001cm" svg:x="0cm" svg:y="2.257cm" draw:page-number="52" presentation:class="page"/>
          <draw:frame draw:name="Espace réservé des notes 1" presentation:style-name="pr117" draw:text-style-name="P10"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3" draw:style-name="dp3" draw:master-page-name="Deux_20_contenus_5f_" presentation:presentation-page-layout-name="AL4T3" presentation:use-footer-name="ftr1">
        <draw:frame draw:name="Titre 35" presentation:style-name="pr93" draw:text-style-name="P14" draw:layer="layout" svg:width="25.233cm" svg:height="2.761cm" svg:x="0.683cm" svg:y="0.16cm" presentation:class="title" presentation:user-transformed="true">
          <draw:text-box>
            <text:p text:style-name="P13"><text:span text:style-name="T7">Améliorer une équation de recherche</text:span></text:p>
          </draw:text-box>
        </draw:frame>
        <draw:custom-shape draw:name="ZoneTexte 13" draw:style-name="gr98" draw:text-style-name="P143" draw:layer="layout" svg:width="20.779cm" svg:height="7.951cm" svg:x="1.219cm" svg:y="3.139cm">
          <text:p text:style-name="P142"><text:span text:style-name="T142">Stratégies supplémentaires si l’équation est trop imprécise, </text:span><text:span text:style-name="T143">i. e.</text:span><text:span text:style-name="T142"> le NNR trop élevé </text:span></text:p>
          <text:list text:style-name="L26">
            <text:list-item>
              <text:p text:style-name="P142"><text:span text:style-name="T142">Remplacer AND par un </text:span><text:span text:style-name="T144">opérateur de proximité</text:span><text:span text:style-name="T142"> lorsque c’est possible</text:span></text:p>
            </text:list-item>
            <text:list-item>
              <text:p text:style-name="P142"><text:span text:style-name="T142">Utiliser les </text:span><text:span text:style-name="T144">filtres par sujet</text:span><text:span text:style-name="T142"> des bases de données → risqué</text:span></text:p>
            </text:list-item>
            <text:list-item>
              <text:p text:style-name="P142"><text:span text:style-name="T142">Utiliser </text:span><text:span text:style-name="T144">NOT</text:span><text:span text:style-name="T142">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5" draw:layer="layout" svg:width="0.001cm" svg:height="0.001cm" svg:x="0cm" svg:y="2.257cm" draw:page-number="53" presentation:class="page"/>
          <draw:frame draw:name="Espace réservé des notes 6" presentation:style-name="pr119" draw:text-style-name="P10"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4" draw:style-name="dp3" draw:master-page-name="Deux_20_contenus_5f_" presentation:presentation-page-layout-name="AL4T3" presentation:use-footer-name="ftr1">
        <draw:frame draw:name="Titre 38" presentation:style-name="pr93" draw:text-style-name="P46" draw:layer="layout" svg:width="25.233cm" svg:height="2.761cm" svg:x="0.766cm" svg:y="0.16cm" presentation:class="title" presentation:user-transformed="true">
          <draw:text-box>
            <text:p text:style-name="P13"><text:span text:style-name="T7">Améliorer une équation de recherche </text:span></text:p>
          </draw:text-box>
        </draw:frame>
        <draw:custom-shape draw:name="ZoneTexte 14" draw:style-name="gr99" draw:text-style-name="P128" draw:layer="layout" svg:width="22.78cm" svg:height="3.299cm" svg:x="0.999cm" svg:y="2.701cm">
          <text:p text:style-name="P126"><text:span text:style-name="T129">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0" draw:text-style-name="P87" draw:layer="layout" svg:width="24.399cm" svg:height="7.525cm" svg:x="0.999cm" svg:y="6.499cm">
          <draw:text-box>
            <text:p text:style-name="P47"><text:span text:style-name="T112">Article 1</text:span><text:span text:style-name="T86"> : Rao, N., Patil, S., Singh, C., Roy, P., Pryor, C., Poonacha, P., &amp; Genes, M. (2022). Cultivating sustainable and healthy cities : A systematic literature review of the outcomes of urban and peri-urban agriculture. </text:span><text:span text:style-name="T145">Sustainable Cities and Society</text:span><text:span text:style-name="T86">, </text:span><text:span text:style-name="T145">85</text:span><text:span text:style-name="T86">, 104063. </text:span><text:span text:style-name="T86"><text:a xlink:href="https://doi.org/10.1016/j.scs.2022.104063" xlink:type="simple">https://doi.org/10.1016/j.scs.2022.104063</text:a></text:span><text:span text:style-name="T86"><text:s/></text:span></text:p>
            <text:p text:style-name="P47"><text:span text:style-name="T112">Article 2</text:span><text:span text:style-name="T86"> : </text:span><text:span text:style-name="T146">Haldon-Hermoso, J., Porras-Bueno, N., &amp; Plaza-Mejía, Á. (2025). Diving into residents’ pro-tourism behaviour : A literature review. </text:span><text:span text:style-name="T147">European Journal of Tourism Research</text:span><text:span text:style-name="T146">, </text:span><text:span text:style-name="T147">40</text:span><text:span text:style-name="T148">, 4017. </text:span><text:span text:style-name="T149"><text:a xlink:href="https://doi.org/10.54055/ejtr.v40i.3636" xlink:type="simple">https://doi.org/10.54055/ejtr.v40i.3636</text:a></text:span></text:p>
          </draw:text-box>
        </draw:frame>
        <presentation:notes draw:style-name="dp4">
          <draw:page-thumbnail draw:name="Espace réservé de l'image des diapositives 36" draw:style-name="gr5" draw:layer="layout" svg:width="0.001cm" svg:height="0.001cm" svg:x="0cm" svg:y="2.257cm" draw:page-number="54" presentation:class="page"/>
          <draw:frame draw:name="Espace réservé des notes 7" presentation:style-name="pr121" draw:text-style-name="P10"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5" draw:style-name="dp3" draw:master-page-name="Deux_20_contenus_5f_" presentation:presentation-page-layout-name="AL4T3" presentation:use-footer-name="ftr1">
        <draw:frame draw:name="Titre 40" presentation:style-name="pr93" draw:text-style-name="P14" draw:layer="layout" svg:width="25.233cm" svg:height="2.761cm" svg:x="0.766cm" svg:y="0.499cm" presentation:class="title" presentation:user-transformed="true">
          <draw:text-box>
            <text:p text:style-name="P13"><text:span text:style-name="T7">Adapter une équation de recherche complexe</text:span></text:p>
          </draw:text-box>
        </draw:frame>
        <draw:custom-shape draw:name="ZoneTexte 17" draw:style-name="gr101" draw:text-style-name="P145" draw:layer="layout" svg:width="21.781cm" svg:height="8.61cm" svg:x="0.999cm" svg:y="3.891cm">
          <text:p text:style-name="P144"><text:span text:style-name="T150">2 cas </text:span></text:p>
          <text:list text:style-name="L26">
            <text:list-item>
              <text:p text:style-name="P144"><text:span text:style-name="T81">Interroger une autre base de données bibliographique → adapter le plus souvent seulement la syntaxe, parfois le vocabulaire ; outil </text:span><text:span text:style-name="T151"><text:a xlink:href="https://sr-accelerator.com/#/polyglot" xlink:type="simple">The </text:a></text:span><text:span text:style-name="T151"><text:a xlink:href="https://sr-accelerator.com/#/polyglot" xlink:type="simple">Polyglot</text:a></text:span><text:span text:style-name="T151"><text:a xlink:href="https://sr-accelerator.com/#/polyglot" xlink:type="simple"> </text:a></text:span><text:span text:style-name="T151"><text:a xlink:href="https://tera-tools.com/polyglot" xlink:type="simple">Search</text:a></text:span><text:span text:style-name="T151"><text:a xlink:href="https://sr-accelerator.com/#/polyglot" xlink:type="simple">Search</text:a></text:span><text:span text:style-name="T151"><text:a xlink:href="https://sr-accelerator.com/#/polyglot" xlink:type="simple"> Translator</text:a></text:span><text:span text:style-name="T60"><text:s/>pour les requêtes créées dans PubMed et Ovid Medline</text:span></text:p>
            </text:list-item>
            <text:list-item>
              <text:p text:style-name="P126"><text:span text:style-name="T123">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5" draw:layer="layout" svg:width="0.001cm" svg:height="0.001cm" svg:x="0cm" svg:y="2.257cm" draw:page-number="55" presentation:class="page"/>
          <draw:frame draw:name="Espace réservé des notes 9" presentation:style-name="pr123" draw:text-style-name="P10"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6" draw:style-name="dp3" draw:master-page-name="Titre_20_de_20_section" presentation:use-footer-name="ftr1">
        <draw:frame draw:name="Titre 6" presentation:style-name="pr14" draw:text-style-name="P32" draw:layer="layout" svg:width="21.907cm" svg:height="5.942cm" svg:x="1.729cm" svg:y="3.359cm" presentation:class="title" presentation:user-transformed="true">
          <draw:text-box>
            <text:p text:style-name="P31"><text:span text:style-name="T1">Constitution et gestion du corpus</text:span></text:p>
          </draw:text-box>
        </draw:frame>
        <draw:frame draw:name="Espace réservé du texte 5" presentation:style-name="pr15" draw:text-style-name="P33" draw:layer="layout" svg:width="21.907cm" svg:height="3.986cm" svg:x="1.729cm" svg:y="9.159cm" presentation:class="outline" presentation:user-transformed="true">
          <draw:text-box>
            <text:p text:style-name="P2"><text:span text:style-name="T19">Zotero : stage dédié ;)</text:span></text:p>
            <text:p text:style-name="P2"><text:span text:style-name="T19">Aperçu des outils disponibles</text:span></text:p>
            <text:p text:style-name="P2"><text:span text:style-name="T19">Focus sur le dédoublonnage et la recherche de texte intégral</text:span></text:p>
            <text:p text:style-name="P90"><text:span text:style-name="T19"/></text:p>
          </draw:text-box>
        </draw:frame>
        <draw:g draw:name="Keywords 4" draw:style-name="gr13">
          <draw:custom-shape draw:name="Rectangle 86"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5" draw:layer="layout" svg:width="0.001cm" svg:height="0.001cm" svg:x="0cm" svg:y="2.257cm" draw:page-number="56" presentation:class="page"/>
          <draw:frame draw:name="Espace réservé des commentaires 6" presentation:style-name="pr125" draw:text-style-name="P10"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7" draw:style-name="dp3" draw:master-page-name="Titre_20_et_20_contenu_5f_" presentation:presentation-page-layout-name="AL2T11" presentation:use-footer-name="ftr1">
        <draw:frame draw:name="Titre 27" presentation:style-name="pr12" draw:text-style-name="P14" draw:layer="layout" svg:width="24.255cm" svg:height="2.761cm" svg:x="0.437cm" svg:y="-0.011cm" presentation:class="title" presentation:user-transformed="true">
          <draw:text-box>
            <text:p text:style-name="P13"><text:span text:style-name="T7">Zotero : stage dédié ;)</text:span></text:p>
          </draw:text-box>
        </draw:frame>
        <draw:frame presentation:style-name="pr126" draw:text-style-name="P146" draw:layer="layout" svg:width="23.055cm" svg:height="2.132cm" svg:x="0.943cm" svg:y="12.155cm" presentation:class="outline" presentation:user-transformed="true">
          <draw:text-box>
            <text:list text:style-name="L11">
              <text:list-item>
                <text:p><text:span text:style-name="T152">Ici : </text:span><text:span text:style-name="T152"><text:a xlink:href="https://github.com/fflamerie/zotero_revlit" xlink:type="simple">https://github.com/fflamerie/zotero_revlit</text:a></text:span></text:p>
              </text:list-item>
            </text:list>
            <text:list text:style-name="L13">
              <text:list-header>
                <text:p><text:span text:style-name="T20"/></text:p>
              </text:list-header>
            </text:list>
          </draw:text-box>
        </draw:frame>
        <draw:frame draw:style-name="gr12" draw:text-style-name="P30" draw:layer="layout" svg:width="23.363cm" svg:height="8.015cm" svg:x="0.636cm" svg:y="3.084cm">
          <draw:image xlink:href="Pictures/10000001000003730000012F6D832605.png" xlink:type="simple" xlink:show="embed" xlink:actuate="onLoad" draw:mime-type="image/png">
            <text:p/>
          </draw:image>
        </draw:frame>
        <presentation:notes draw:style-name="dp4">
          <draw:page-thumbnail draw:name="Espace réservé de l'image des diapositives 45" draw:style-name="gr5" draw:layer="layout" svg:width="0.001cm" svg:height="0.001cm" svg:x="0cm" svg:y="2.257cm" draw:page-number="57" presentation:class="page"/>
          <draw:frame draw:name="Espace réservé des commentaires 36" presentation:style-name="pr127" draw:text-style-name="P10" draw:layer="layout" svg:width="15.239cm" svg:height="10cm" svg:x="1.905cm" svg:y="12.224cm" presentation:class="notes" presentation:placeholder="true" presentation:user-transformed="true">
            <draw:text-box/>
          </draw:frame>
          <draw:frame draw:name="Espace réservé du numéro de diapositive 45" presentation:style-name="pr12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8" draw:style-name="dp3" draw:master-page-name="Titre_20_et_20_contenu_5f_" presentation:presentation-page-layout-name="AL2T11" presentation:use-footer-name="ftr1">
        <draw:frame draw:name="Titre 47" presentation:style-name="pr12" draw:text-style-name="P147" draw:layer="layout" svg:width="24.255cm" svg:height="2.761cm" svg:x="0.437cm" svg:y="-0.211cm" presentation:class="title" presentation:user-transformed="true">
          <draw:text-box>
            <text:p text:style-name="P13"><text:span text:style-name="T7">Aperçu des outils disponibles</text:span></text:p>
          </draw:text-box>
        </draw:frame>
        <draw:frame presentation:style-name="pr129" draw:text-style-name="P146" draw:layer="layout" svg:width="23.055cm" svg:height="1.809cm" svg:x="1.498cm" svg:y="13.19cm" presentation:class="outline" presentation:user-transformed="true">
          <draw:text-box>
            <text:list text:style-name="L11">
              <text:list-item>
                <text:p><text:span text:style-name="T153"><text:a xlink:href="https://github.com/fflamerie/intro_revlit/blob/main/docs/Outils_RevLit.pdf" xlink:type="simple">Au format PDF dimensions A4</text:a></text:span></text:p>
              </text:list-item>
            </text:list>
            <text:list text:style-name="L13">
              <text:list-header>
                <text:p><text:span text:style-name="T20"/></text:p>
              </text:list-header>
            </text:list>
          </draw:text-box>
        </draw:frame>
        <draw:frame draw:style-name="gr12" draw:text-style-name="P30"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5" draw:layer="layout" svg:width="0.001cm" svg:height="0.001cm" svg:x="0cm" svg:y="2.257cm" draw:page-number="58" presentation:class="page"/>
          <draw:frame draw:name="Espace réservé des commentaires 37" presentation:style-name="pr130" draw:text-style-name="P10" draw:layer="layout" svg:width="15.239cm" svg:height="10cm" svg:x="1.905cm" svg:y="12.224cm" presentation:class="notes" presentation:placeholder="true" presentation:user-transformed="true">
            <draw:text-box/>
          </draw:frame>
          <draw:frame draw:name="Espace réservé du numéro de diapositive 49" presentation:style-name="pr1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9" draw:style-name="dp3" draw:master-page-name="Deux_20_contenus_5f_" presentation:presentation-page-layout-name="AL4T3" presentation:use-footer-name="ftr1">
        <draw:frame draw:name="Titre 48"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10" draw:style-name="gr102" draw:text-style-name="P134" draw:layer="layout" svg:width="22.78cm" svg:height="7.026cm" svg:x="0.719cm" svg:y="3.136cm">
          <text:p text:style-name="P133"><text:span text:style-name="T154">Points d’attention</text:span></text:p>
          <text:list text:style-name="L26">
            <text:list-item>
              <text:p text:style-name="P133"><text:span text:style-name="T154">Risque de faux positifs </text:span></text:p>
            </text:list-item>
            <text:list-item>
              <text:p text:style-name="P133"><text:span text:style-name="T154">Volumétrie</text:span></text:p>
            </text:list-item>
            <text:list-item>
              <text:p text:style-name="P133"><text:span text:style-name="T154">Travailler en ligne ou en local</text:span></text:p>
            </text:list-item>
            <text:list-item>
              <text:p text:style-name="P133"><text:span text:style-name="T154">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5" draw:layer="layout" svg:width="0.001cm" svg:height="0.001cm" svg:x="0cm" svg:y="2.257cm" draw:page-number="59" presentation:class="page"/>
          <draw:frame draw:name="Espace réservé des notes 13" presentation:style-name="pr132" draw:text-style-name="P10" draw:layer="layout" svg:width="15.239cm" svg:height="10cm" svg:x="1.905cm" svg:y="12.224cm" presentation:class="notes" presentation:placeholder="true" presentation:user-transformed="true">
            <draw:text-box/>
          </draw:frame>
          <draw:frame draw:name="Espace réservé du numéro de diapositive 50" presentation:style-name="pr13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0" draw:style-name="dp3" draw:master-page-name="Deux_20_contenus_5f_" presentation:presentation-page-layout-name="AL4T3" presentation:use-footer-name="ftr1">
        <draw:frame draw:name="Titre 45"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6" draw:style-name="gr103" draw:text-style-name="P128" draw:layer="layout" svg:width="22.78cm" svg:height="12.197cm" svg:x="0.625cm" svg:y="2.9cm">
          <text:p text:style-name="P126"><text:span text:style-name="T129">Plusieurs méthodes et outils</text:span></text:p>
          <text:list text:style-name="L26">
            <text:list-item>
              <text:p text:style-name="P126"><text:span text:style-name="T133">tableur</text:span><text:span text:style-name="T129"> : mise en forme conditionnelle, tris et filtres</text:span></text:p>
            </text:list-item>
            <text:list-item>
              <text:p text:style-name="P126"><text:span text:style-name="T133">logiciel de gestion de bibliographie</text:span><text:span text:style-name="T129"> : NB </text:span><text:span text:style-name="T129"><text:a xlink:href="https://github.com/ChenglongMa/zoplicate" xlink:type="simple">extension Zoplicate</text:a></text:span><text:span text:style-name="T129"><text:s/>pour + de fonctionnalités avec Zotero</text:span></text:p>
            </text:list-item>
            <text:list-item>
              <text:p text:style-name="P126"><text:span text:style-name="T133">logiciels spécialisés</text:span><text:span text:style-name="T129"> : cf. exemples versions gratuites de Rayyan et PICO Portal </text:span><text:span text:style-name="T132">infra</text:span><text:span text:style-name="T129"> + service gratuit </text:span><text:span text:style-name="T129"><text:a xlink:href="https://tera-tools.com/help/deduplicator" xlink:type="simple">Deduplicator</text:a></text:span><text:span text:style-name="T129"><text:s/>+ service payant </text:span><text:span text:style-name="T129"><text:a xlink:href="https://www.risklick.ch/deduklick" xlink:type="simple">Deduklick</text:a></text:span></text:p>
            </text:list-item>
          </text:list>
          <text:list text:style-name="L27">
            <text:list-item>
              <text:list>
                <text:list-item>
                  <text:p text:style-name="P127"><text:span text:style-name="T127">Voir : Janka, H., &amp; Metzendorf, M.-I. (2024). High precision but variable recall – comparing the performance of five deduplication tools. </text:span><text:span text:style-name="T155">Journal of EAHIL, 20</text:span><text:span text:style-name="T127">(1), 12‑17. https://doi.org/10.32384/jeahil20607</text:span></text:p>
                </text:list-item>
              </text:list>
            </text:list-item>
          </text:list>
          <text:p text:style-name="P148"><text:span text:style-name="T127"/></text:p>
          <text:p text:style-name="P126"><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5" draw:layer="layout" svg:width="0.001cm" svg:height="0.001cm" svg:x="0cm" svg:y="2.257cm" draw:page-number="60" presentation:class="page"/>
          <draw:frame draw:name="Espace réservé des notes 10" presentation:style-name="pr134" draw:text-style-name="P10"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1" draw:style-name="dp3" draw:master-page-name="Deux_20_contenus_5f_" presentation:presentation-page-layout-name="AL4T3" presentation:use-footer-name="ftr1">
        <draw:frame draw:name="Titre 53"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1" draw:style-name="gr104" draw:text-style-name="P128" draw:layer="layout" svg:width="22.78cm" svg:height="2.961cm" svg:x="0.999cm" svg:y="2.202cm">
          <text:p text:style-name="P126"><text:span text:style-name="T156">Dédoublonnage avec PICO Portal (version gratuite) : peu d’outils d’aide à la décision, repérage peu précis, pas de fusion par lot</text:span></text:p>
          <text:p text:style-name="P126"><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3cm" svg:height="9.65cm" svg:x="0.999cm" svg:y="4.349cm">
          <draw:image xlink:href="Pictures/10000001000004E80000020FE2C00961.png" xlink:type="simple" xlink:show="embed" xlink:actuate="onLoad" draw:mime-type="image/png">
            <text:p/>
          </draw:image>
        </draw:frame>
        <presentation:notes draw:style-name="dp4">
          <draw:page-thumbnail draw:name="Espace réservé de l'image des diapositives 55" draw:style-name="gr5" draw:layer="layout" svg:width="0.001cm" svg:height="0.001cm" svg:x="0cm" svg:y="2.257cm" draw:page-number="61" presentation:class="page"/>
          <draw:frame draw:name="Espace réservé des notes 15" presentation:style-name="pr136" draw:text-style-name="P10"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2" draw:style-name="dp3" draw:master-page-name="Deux_20_contenus_5f_" presentation:presentation-page-layout-name="AL4T3" presentation:use-footer-name="ftr1">
        <draw:frame draw:name="Titre 56"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2" draw:style-name="gr105" draw:text-style-name="P128" draw:layer="layout" svg:width="22.78cm" svg:height="2.961cm" svg:x="0.999cm" svg:y="2.002cm">
          <text:p text:style-name="P126"><text:span text:style-name="T156">Dédoublonnage avec Rayyan (version gratuite) : repérage peu précis, pas de fusion par lot</text:span></text:p>
          <text:p text:style-name="P126"><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5cm" svg:height="10.102cm" svg:x="1.999cm" svg:y="3.985cm">
          <draw:image xlink:href="Pictures/10000001000004180000021F0517D9FA.png" xlink:type="simple" xlink:show="embed" xlink:actuate="onLoad" draw:mime-type="image/png">
            <text:p/>
          </draw:image>
        </draw:frame>
        <presentation:notes draw:style-name="dp4">
          <draw:page-thumbnail draw:name="Espace réservé de l'image des diapositives 58" draw:style-name="gr5" draw:layer="layout" svg:width="0.001cm" svg:height="0.001cm" svg:x="0cm" svg:y="2.257cm" draw:page-number="62" presentation:class="page"/>
          <draw:frame draw:name="Espace réservé des notes 16" presentation:style-name="pr138" draw:text-style-name="P10"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3" draw:style-name="dp3" draw:master-page-name="Deux_20_contenus_5f_" presentation:presentation-page-layout-name="AL4T3" presentation:use-footer-name="ftr1">
        <draw:frame draw:name="Titre 46" presentation:style-name="pr93" draw:text-style-name="P46"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19" draw:style-name="gr106" draw:text-style-name="P136" draw:layer="layout" svg:width="21.5cm" svg:height="7.367cm" svg:x="0.814cm" svg:y="3.65cm">
          <text:p text:style-name="P135"><text:span text:style-name="T157">Plusieurs méthodes et outils - 1/2</text:span></text:p>
          <text:list text:style-name="L26">
            <text:list-item>
              <text:p text:style-name="P135"><text:span text:style-name="T70">OpenURL EndNote</text:span><text:span text:style-name="T157"> : recherche automatique et téléchargement par lot <text:s/></text:span></text:p>
            </text:list-item>
            <text:list-item>
              <text:p text:style-name="P135"><text:span text:style-name="T70">OpenURL Zotero</text:span><text:span text:style-name="T157"> : recherche manuelle et à l’unité </text:span></text:p>
            </text:list-item>
          </text:list>
          <text:list text:style-name="L27">
            <text:list-item>
              <text:list>
                <text:list-item>
                  <text:p text:style-name="P149"><text:span text:style-name="T157">Toutes les fonctionnalités de Zotero pour la recherche de texte intégral : </text:span><text:span text:style-name="T157"><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5" draw:layer="layout" svg:width="0.001cm" svg:height="0.001cm" svg:x="0cm" svg:y="2.257cm" draw:page-number="63" presentation:class="page"/>
          <draw:frame draw:name="Espace réservé des notes 12" presentation:style-name="pr140" draw:text-style-name="P10" draw:layer="layout" svg:width="15.239cm" svg:height="10cm" svg:x="1.905cm" svg:y="12.224cm" presentation:class="notes" presentation:placeholder="true" presentation:user-transformed="true">
            <draw:text-box/>
          </draw:frame>
          <draw:frame draw:name="Espace réservé du numéro de diapositive 48" presentation:style-name="pr14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4" draw:style-name="dp3" draw:master-page-name="Deux_20_contenus_5f_" presentation:presentation-page-layout-name="AL4T3" presentation:use-footer-name="ftr1">
        <draw:frame draw:name="Titre 54" presentation:style-name="pr93" draw:text-style-name="P46"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20" draw:style-name="gr107" draw:text-style-name="P143" draw:layer="layout" svg:width="22.407cm" svg:height="9.653cm" svg:x="1.156cm" svg:y="2.921cm">
          <text:p text:style-name="P142"><text:span text:style-name="T157">Plusieurs méthodes et outils - 2/2</text:span></text:p>
          <text:list text:style-name="L26">
            <text:list-item>
              <text:p text:style-name="P142"><text:span text:style-name="T70">Logiciels spécialisés</text:span><text:span text:style-name="T157"> cf. </text:span><text:span text:style-name="T158">supra</text:span></text:p>
            </text:list-item>
            <text:list-item>
              <text:p text:style-name="P142"><text:span text:style-name="T157"><text:a xlink:href="https://clickandread.inist.fr/" xlink:type="simple">Extension Click &amp; Read</text:a></text:span><text:span text:style-name="T157"><text:s/>du CNRS </text:span></text:p>
            </text:list-item>
          </text:list>
          <text:list text:style-name="L27">
            <text:list-item>
              <text:list>
                <text:list-item>
                  <text:p text:style-name="P150"><text:span text:style-name="T157"><text:a xlink:href="https://docs.zotero-fr.org/kbfr/kbfr_click_and_read_biblio_html/" xlink:type="simple">Fiche Click &amp; Read et Zotero</text:a></text:span></text:p>
                </text:list-item>
              </text:list>
            </text:list-item>
          </text:list>
          <text:list text:style-name="L26">
            <text:list-item>
              <text:p text:style-name="P142"><text:span text:style-name="T157">Recherches manuelles souvent incontournables : revues imprimées, numérisation et indexation au fascicule et non à l’article, etc.</text:span></text:p>
            </text:list-item>
          </text:list>
          <text:p text:style-name="P142"><text:span text:style-name="T1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5" draw:layer="layout" svg:width="0.001cm" svg:height="0.001cm" svg:x="0cm" svg:y="2.257cm" draw:page-number="64" presentation:class="page"/>
          <draw:frame draw:name="Espace réservé des notes 14" presentation:style-name="pr142" draw:text-style-name="P10" draw:layer="layout" svg:width="15.239cm" svg:height="10cm" svg:x="1.905cm" svg:y="12.224cm" presentation:class="notes" presentation:placeholder="true" presentation:user-transformed="true">
            <draw:text-box/>
          </draw:frame>
          <draw:frame draw:name="Espace réservé du numéro de diapositive 56" presentation:style-name="pr14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Merci pour votre attention" draw:style-name="dp3" draw:master-page-name="Titre_20_de_20_section" presentation:use-footer-name="ftr1">
        <draw:frame draw:name="Titre 1" presentation:style-name="pr14" draw:text-style-name="P151" draw:layer="layout" svg:width="21.907cm" svg:height="5.942cm" svg:x="1.729cm" svg:y="3.559cm" presentation:class="title" presentation:user-transformed="true">
          <draw:text-box>
            <text:p text:style-name="P13"><text:span text:style-name="T1">Merci pour votre attention</text:span></text:p>
          </draw:text-box>
        </draw:frame>
        <draw:frame draw:name="Espace réservé du contenu 2" presentation:style-name="pr15" draw:text-style-name="P33" draw:layer="layout" svg:width="21.907cm" svg:height="3.125cm" svg:x="1.729cm" svg:y="9.559cm" presentation:class="outline" presentation:user-transformed="true">
          <draw:text-box>
            <text:p text:style-name="P2"><text:span text:style-name="T19">Des questions?</text:span></text:p>
            <text:p text:style-name="P2"><text:span text:style-name="T19">Contact : </text:span><text:span text:style-name="T19"><text:a xlink:href="mailto:frederique.flamerie@pm.me" xlink:type="simple">frederique.flamerie@pm.me</text:a></text:span></text:p>
          </draw:text-box>
        </draw:frame>
        <draw:g draw:name="Keywords 5" draw:style-name="gr13">
          <draw:custom-shape draw:name="Rectangle 109" draw:style-name="gr14" draw:text-style-name="P34"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5" draw:text-style-name="P34"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5" draw:text-style-name="P34"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5" draw:text-style-name="P34"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5" draw:text-style-name="P34"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6" draw:text-style-name="P34"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5" draw:text-style-name="P34"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5" draw:text-style-name="P34"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7" draw:text-style-name="P34"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8" draw:text-style-name="P34"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5" draw:text-style-name="P34"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5" draw:text-style-name="P34"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5" draw:text-style-name="P34"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5" draw:text-style-name="P34"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9" draw:text-style-name="P34"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20" draw:text-style-name="P34"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21" draw:text-style-name="P34"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22" draw:text-style-name="P34"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5" draw:text-style-name="P34"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9" draw:text-style-name="P34"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3" draw:text-style-name="P34"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4" draw:text-style-name="P34"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65" presentation:class="page"/>
          <draw:frame draw:name="Espace réservé des commentaires 2" presentation:style-name="pr144"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lef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lef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lef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lef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lef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lef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left" fo:text-indent="0cm" style:text-autospace="none"/>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lef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left" style:text-autospace="none"/>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lef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lef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Microsoft YaHei1" style:font-family-asian="'Microsoft YaHei'" style:font-pitch-asian="variable" style:font-name-complex="Liberation Sans"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left" style:text-autospace="none"/>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left" style:text-autospace="none"/>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lef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lef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lef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lef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left" style:text-autospace="none"/>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right" style:text-autospace="none"/>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right"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left" fo:text-indent="0cm"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left" style:text-autospace="none"/>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lef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right" fo:text-indent="0cm" style:text-autospace="none"/>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right" style:text-autospace="none"/>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lef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right"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lef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right"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right"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lef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left" fo:text-indent="0cm"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lef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right" fo:text-indent="0cm" style:text-autospace="none"/>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lef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left" fo:text-indent="0cm" style:text-autospace="none"/>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right"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left" fo:text-indent="0cm" style:text-autospace="none" loext:tab-stop-distance="0cm">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right" style:text-autospace="none"/>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lef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left"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right" style:text-autospace="none"/>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left"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right"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left"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lef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lef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left" style:text-autospace="none"/>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right"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lef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lef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right" style:text-autospace="none"/>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lef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right"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left" style:text-autospace="none"/>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lef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right"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right"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left" style:text-autospace="none"/>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left" fo:text-indent="0cm"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right" style:text-autospace="none"/>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lef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lef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lef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lef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lef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lef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lef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lef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lef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lef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lef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left" style:text-autospace="none"/>
      <style:text-properties style:font-name="Liberation Sans" fo:font-family="'Liberation Sans', Arial" style:font-family-generic="swiss" style:font-pitch="variable" fo:font-size="14pt" style:font-name-asian="Microsoft YaHei1" style:font-family-asian="'Microsoft YaHei'" style:font-pitch-asian="variable" style:font-size-asian="14pt" style:font-name-complex="Liberation Sans"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lef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lef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lef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left" style:font-independent-line-spacing="true"/>
      <style:text-properties fo:font-size="60pt"/>
    </style:style>
    <style:style style:name="MP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lef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lef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lef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left" style:font-independent-line-spacing="true"/>
      <style:text-properties fo:font-size="44pt"/>
    </style:style>
    <style:style style:name="MP14" style:family="paragraph">
      <style:paragraph-properties fo:margin-left="0cm" fo:margin-right="0cm" fo:margin-top="0.353cm" fo:margin-bottom="0cm" fo:line-height="90%" fo:text-align="lef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lef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lef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lef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lef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lef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left" style:font-independent-line-spacing="true"/>
      <style:text-properties fo:font-size="28pt"/>
    </style:style>
    <style:style style:name="MP23" style:family="paragraph">
      <style:paragraph-properties fo:margin-left="0cm" fo:margin-right="0cm" fo:margin-top="0.353cm" fo:margin-bottom="0cm" fo:line-height="90%" fo:text-align="lef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lef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left" style:font-independent-line-spacing="true"/>
      <style:text-properties fo:font-size="24pt"/>
    </style:style>
    <style:style style:name="MP26" style:family="paragraph">
      <loext:graphic-properties draw:fill="none"/>
      <style:paragraph-properties fo:text-align="lef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right"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lef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32</meta:editing-cycles>
    <meta:creation-date>2021-04-30T15:31:12</meta:creation-date>
    <dc:date>2026-05-05T08:32:44.532616800</dc:date>
    <meta:editing-duration>P1DT14H27M55S</meta:editing-duration>
    <meta:generator>LibreOffice/26.2.1.2$Windows_X86_64 LibreOffice_project/620$Build-2</meta:generator>
    <meta:print-date>2026-01-30T14:21:45.161834700</meta:print-date>
    <meta:printed-by>Fichiers PDF</meta:printed-by>
    <meta:document-statistic meta:object-count="664"/>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